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ptos Display" svg:font-family="Aptos Display" style:font-family-generic="swiss" style:font-pitch="variable"/>
    <style:font-face style:name="Power Clear" svg:font-family="Power Clear" style:font-family-generic="system" style:font-pitch="variable" svg:panose-1="1 0 0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ptos" svg:font-family="Aptos" style:font-family-generic="swiss" style:font-pitch="variable"/>
  </office:font-face-decls>
  <office:automatic-styles>
    <style:style style:name="P1" style:parent-style-name="Title" style:master-page-name="MP0" style:family="paragraph">
      <style:paragraph-properties fo:break-before="page" fo:border-top="none" fo:border-left="none" fo:border-bottom="0.0208in solid #000000" fo:border-right="none" fo:padding-top="0in" fo:padding-left="0in" fo:padding-bottom="0.0138in" fo:padding-right="0in" style:shadow="none" fo:text-align="center"/>
      <style:text-properties style:font-name="Power Clear" fo:font-weight="bold" style:font-weight-asian="bold" style:font-weight-complex="bold" fo:language="fr" fo:country="FR"/>
    </style:style>
    <style:style style:name="P2" style:parent-style-name="Standard" style:family="paragraph">
      <style:text-properties style:font-name="Power Clear" fo:language="fr" fo:country="FR"/>
    </style:style>
    <style:style style:name="T3" style:parent-style-name="DefaultParagraphFont" style:family="text">
      <style:text-properties style:font-name="Power Clear" fo:language="fr" fo:country="FR"/>
    </style:style>
    <style:style style:name="T4" style:parent-style-name="DefaultParagraphFont" style:family="text">
      <style:text-properties style:font-name="Power Clear" style:font-name-asian="MS Gothic" style:font-name-complex="MS Gothic" fo:language="fr" fo:country="FR"/>
    </style:style>
    <style:style style:name="T5" style:parent-style-name="DefaultParagraphFont" style:family="text">
      <style:text-properties style:font-name="Power Clear" style:font-name-asian="MS Gothic" style:font-name-complex="MS Gothic" fo:language="fr" fo:country="FR"/>
    </style:style>
    <style:style style:name="T6" style:parent-style-name="DefaultParagraphFont" style:family="text">
      <style:text-properties style:font-name="Cambria" style:font-name-asian="MS Gothic" style:font-name-complex="Cambria" fo:language="fr" fo:country="FR"/>
    </style:style>
    <style:style style:name="T7" style:parent-style-name="DefaultParagraphFont" style:family="text">
      <style:text-properties style:font-name="Power Clear" style:font-name-asian="MS Gothic" style:font-name-complex="MS Gothic" fo:language="fr" fo:country="FR"/>
    </style:style>
    <style:style style:name="T8" style:parent-style-name="DefaultParagraphFont" style:family="text">
      <style:text-properties style:font-name="Cambria" style:font-name-asian="MS Gothic" style:font-name-complex="Cambria" fo:language="fr" fo:country="FR"/>
    </style:style>
    <style:style style:name="T9" style:parent-style-name="DefaultParagraphFont" style:family="text">
      <style:text-properties style:font-name="Power Clear" style:font-name-asian="MS Gothic" style:font-name-complex="MS Gothic" fo:language="fr" fo:country="FR"/>
    </style:style>
    <style:style style:name="T10" style:parent-style-name="DefaultParagraphFont" style:family="text">
      <style:text-properties style:font-name="Power Clear" style:font-name-asian="MS Gothic" style:font-name-complex="MS Gothic" fo:language="fr" fo:country="FR"/>
    </style:style>
    <style:style style:name="T11" style:parent-style-name="DefaultParagraphFont" style:family="text">
      <style:text-properties style:font-name="Cambria" style:font-name-asian="MS Gothic" style:font-name-complex="Cambria" fo:language="fr" fo:country="FR"/>
    </style:style>
    <style:style style:name="T12" style:parent-style-name="DefaultParagraphFont" style:family="text">
      <style:text-properties style:font-name="Power Clear" style:font-name-asian="MS Gothic" style:font-name-complex="MS Gothic" fo:language="fr" fo:country="FR"/>
    </style:style>
    <style:style style:name="T13" style:parent-style-name="DefaultParagraphFont" style:family="text">
      <style:text-properties style:font-name="Cambria" style:font-name-asian="MS Gothic" style:font-name-complex="Cambria" fo:language="fr" fo:country="FR"/>
    </style:style>
    <style:style style:name="T14" style:parent-style-name="DefaultParagraphFont" style:family="text">
      <style:text-properties style:font-name="Power Clear" style:font-name-asian="MS Gothic" style:font-name-complex="MS Gothic" fo:language="fr" fo:country="FR"/>
    </style:style>
    <style:style style:name="P15" style:parent-style-name="Standard" style:family="paragraph">
      <style:text-properties style:font-name="Power Clear" fo:language="fr" fo:country="FR"/>
    </style:style>
    <style:style style:name="P16" style:parent-style-name="Standard" style:family="paragraph">
      <style:text-properties style:font-name="Power Clear" fo:language="fr" fo:country="FR"/>
    </style:style>
    <style:style style:name="T17" style:parent-style-name="DefaultParagraphFont" style:family="text">
      <style:text-properties style:font-name="Power Clear" fo:font-weight="bold" style:font-weight-asian="bold" style:font-weight-complex="bold" fo:language="fr" fo:country="FR"/>
    </style:style>
    <style:style style:name="T18" style:parent-style-name="DefaultParagraphFont" style:family="text">
      <style:text-properties style:font-name="Cambria" style:font-name-complex="Cambria" fo:font-weight="bold" style:font-weight-asian="bold" style:font-weight-complex="bold" fo:language="fr" fo:country="FR"/>
    </style:style>
    <style:style style:name="T19" style:parent-style-name="DefaultParagraphFont" style:family="text">
      <style:text-properties style:font-name="Power Clear" fo:font-weight="bold" style:font-weight-asian="bold" style:font-weight-complex="bold" fo:language="fr" fo:country="FR"/>
    </style:style>
    <style:style style:name="P20" style:parent-style-name="Standard" style:family="paragraph">
      <style:text-properties style:font-name="Power Clear" fo:language="fr" fo:country="FR"/>
    </style:style>
    <style:style style:name="T21" style:parent-style-name="DefaultParagraphFont" style:family="text">
      <style:text-properties style:font-name="Power Clear" fo:language="fr" fo:country="FR"/>
    </style:style>
    <style:style style:name="T22" style:parent-style-name="DefaultParagraphFont" style:family="text">
      <style:text-properties style:font-name="Cambria" style:font-name-complex="Cambria" fo:language="fr" fo:country="FR"/>
    </style:style>
    <style:style style:name="T23" style:parent-style-name="DefaultParagraphFont" style:family="text">
      <style:text-properties style:font-name="Power Clear" fo:language="fr" fo:country="FR"/>
    </style:style>
    <style:style style:name="P24" style:parent-style-name="Standard" style:family="paragraph">
      <style:text-properties style:font-name="Power Clear" fo:language="fr" fo:country="FR"/>
    </style:style>
    <style:style style:name="T25" style:parent-style-name="DefaultParagraphFont" style:family="text">
      <style:text-properties style:font-name="Power Clear" fo:language="fr" fo:country="FR"/>
    </style:style>
    <style:style style:name="T26" style:parent-style-name="DefaultParagraphFont" style:family="text">
      <style:text-properties style:font-name="Cambria" style:font-name-complex="Cambria" fo:language="fr" fo:country="FR"/>
    </style:style>
    <style:style style:name="T27" style:parent-style-name="DefaultParagraphFont" style:family="text">
      <style:text-properties style:font-name="Power Clear" fo:language="fr" fo:country="FR"/>
    </style:style>
    <style:style style:name="P28" style:parent-style-name="Standard" style:family="paragraph">
      <style:text-properties style:font-name="Power Clear" fo:language="fr" fo:country="FR"/>
    </style:style>
    <style:style style:name="P29" style:parent-style-name="Standard" style:family="paragraph">
      <style:text-properties style:font-name="Power Clear" fo:language="fr" fo:country="FR"/>
    </style:style>
    <style:style style:name="P30" style:parent-style-name="Standard" style:family="paragraph">
      <style:text-properties style:font-name="Power Clear" fo:language="fr" fo:country="FR"/>
    </style:style>
    <style:style style:name="T31" style:parent-style-name="DefaultParagraphFont" style:family="text">
      <style:text-properties style:font-name="Power Clear" fo:language="fr" fo:country="FR"/>
    </style:style>
    <style:style style:name="T32" style:parent-style-name="DefaultParagraphFont" style:family="text">
      <style:text-properties style:font-name="Cambria" style:font-name-complex="Cambria" fo:language="fr" fo:country="FR"/>
    </style:style>
    <style:style style:name="T33" style:parent-style-name="DefaultParagraphFont" style:family="text">
      <style:text-properties style:font-name="Power Clear" fo:language="fr" fo:country="FR"/>
    </style:style>
    <style:style style:name="T34" style:parent-style-name="DefaultParagraphFont" style:family="text">
      <style:text-properties style:font-name="Power Clear" style:text-position="super 58.3%" fo:language="fr" fo:country="FR"/>
    </style:style>
    <style:style style:name="T35" style:parent-style-name="DefaultParagraphFont" style:family="text">
      <style:text-properties style:font-name="Power Clear" fo:language="fr" fo:country="FR"/>
    </style:style>
    <style:style style:name="T36" style:parent-style-name="DefaultParagraphFont" style:family="text">
      <style:text-properties style:font-name="Cambria" style:font-name-complex="Cambria" fo:language="fr" fo:country="FR"/>
    </style:style>
    <style:style style:name="T37" style:parent-style-name="DefaultParagraphFont" style:family="text">
      <style:text-properties style:font-name="Power Clear" fo:language="fr" fo:country="FR"/>
    </style:style>
    <style:style style:name="T38" style:parent-style-name="DefaultParagraphFont" style:family="text">
      <style:text-properties style:font-name="Cambria" style:font-name-complex="Cambria" fo:language="fr" fo:country="FR"/>
    </style:style>
    <style:style style:name="T39" style:parent-style-name="DefaultParagraphFont" style:family="text">
      <style:text-properties style:font-name="Power Clear" style:font-name-complex="Power Clear" fo:language="fr" fo:country="FR"/>
    </style:style>
    <style:style style:name="T40" style:parent-style-name="DefaultParagraphFont" style:family="text">
      <style:text-properties style:font-name="Power Clear" fo:language="fr" fo:country="FR"/>
    </style:style>
    <style:style style:name="P41" style:parent-style-name="Standard" style:family="paragraph">
      <style:text-properties style:font-name="Power Clear" fo:language="fr" fo:country="FR"/>
    </style:style>
    <style:style style:name="P42" style:parent-style-name="Standard" style:family="paragraph">
      <style:text-properties style:font-name="Power Clear" fo:language="fr" fo:country="FR"/>
    </style:style>
    <style:style style:name="T43" style:parent-style-name="DefaultParagraphFont" style:family="text">
      <style:text-properties style:font-name="Power Clear" fo:language="fr" fo:country="FR"/>
    </style:style>
    <style:style style:name="T44" style:parent-style-name="DefaultParagraphFont" style:family="text">
      <style:text-properties style:font-name="Cambria" style:font-name-complex="Cambria" fo:language="fr" fo:country="FR"/>
    </style:style>
    <style:style style:name="T45" style:parent-style-name="DefaultParagraphFont" style:family="text">
      <style:text-properties style:font-name="Power Clear" fo:language="fr" fo:country="FR"/>
    </style:style>
    <style:style style:name="T46" style:parent-style-name="DefaultParagraphFont" style:family="text">
      <style:text-properties style:font-name="Power Clear" fo:color="#00B050" fo:language="fr" fo:country="FR"/>
    </style:style>
    <style:style style:name="T47" style:parent-style-name="DefaultParagraphFont" style:family="text">
      <style:text-properties style:font-name="Power Clear" fo:language="fr" fo:country="FR"/>
    </style:style>
    <style:style style:name="T48" style:parent-style-name="DefaultParagraphFont" style:family="text">
      <style:text-properties style:font-name="Power Clear" fo:color="#E97132" fo:language="fr" fo:country="FR"/>
    </style:style>
    <style:style style:name="T49" style:parent-style-name="DefaultParagraphFont" style:family="text">
      <style:text-properties style:font-name="Power Clear" fo:language="fr" fo:country="FR"/>
    </style:style>
    <style:style style:name="T50" style:parent-style-name="DefaultParagraphFont" style:family="text">
      <style:text-properties style:font-name="Power Clear" fo:color="#00B0F0" fo:language="fr" fo:country="FR"/>
    </style:style>
    <style:style style:name="T51" style:parent-style-name="DefaultParagraphFont" style:family="text">
      <style:text-properties style:font-name="Power Clear" fo:language="fr" fo:country="FR"/>
    </style:style>
    <style:style style:name="P52" style:parent-style-name="Standard" style:family="paragraph">
      <style:text-properties style:font-name="Power Clear" fo:language="fr" fo:country="FR"/>
    </style:style>
    <style:style style:name="P53" style:parent-style-name="Standard" style:family="paragraph">
      <style:text-properties style:font-name="Power Clear" fo:language="fr" fo:country="FR"/>
    </style:style>
    <style:style style:name="T54" style:parent-style-name="DefaultParagraphFont" style:family="text">
      <style:text-properties style:font-name="Power Clear" fo:language="fr" fo:country="FR"/>
    </style:style>
    <style:style style:name="T55" style:parent-style-name="DefaultParagraphFont" style:family="text">
      <style:text-properties style:font-name="Cambria" style:font-name-complex="Cambria" fo:language="fr" fo:country="FR"/>
    </style:style>
    <style:style style:name="T56" style:parent-style-name="DefaultParagraphFont" style:family="text">
      <style:text-properties style:font-name="Power Clear" fo:language="fr" fo:country="FR"/>
    </style:style>
    <style:style style:name="P57" style:parent-style-name="Standard" style:family="paragraph">
      <style:text-properties style:font-name="Power Clear" fo:language="fr" fo:country="FR"/>
    </style:style>
    <style:style style:name="P58" style:parent-style-name="Standard" style:family="paragraph">
      <style:text-properties style:font-name="Power Clear" fo:language="fr" fo:country="FR"/>
    </style:style>
    <style:style style:name="P59" style:parent-style-name="Standard" style:family="paragraph">
      <style:text-properties style:font-name="Power Clear" fo:language="fr" fo:country="FR"/>
    </style:style>
    <style:style style:name="P60" style:parent-style-name="Standard" style:family="paragraph">
      <style:text-properties style:font-name="Power Clear" fo:language="fr" fo:country="FR"/>
    </style:style>
    <style:style style:name="P61" style:parent-style-name="Standard" style:family="paragraph">
      <style:text-properties style:font-name="Power Clear" fo:language="fr" fo:country="FR"/>
    </style:style>
    <style:style style:name="P62" style:parent-style-name="Standard" style:family="paragraph">
      <style:text-properties style:font-name="Power Clear" fo:language="fr" fo:country="FR"/>
    </style:style>
    <style:style style:name="P63" style:parent-style-name="Standard" style:family="paragraph">
      <style:text-properties style:font-name="Power Clear" fo:language="fr" fo:country="FR"/>
    </style:style>
    <style:style style:name="T64" style:parent-style-name="DefaultParagraphFont" style:family="text">
      <style:text-properties style:font-name="Power Clear" fo:language="fr" fo:country="FR"/>
    </style:style>
    <style:style style:name="T65" style:parent-style-name="DefaultParagraphFont" style:family="text">
      <style:text-properties style:font-name="Cambria" style:font-name-complex="Cambria" fo:language="fr" fo:country="FR"/>
    </style:style>
    <style:style style:name="T66" style:parent-style-name="DefaultParagraphFont" style:family="text">
      <style:text-properties style:font-name="Power Clear" fo:language="fr" fo:country="FR"/>
    </style:style>
    <style:style style:name="P67" style:parent-style-name="Standard" style:family="paragraph">
      <style:text-properties style:font-name="Power Clear" fo:language="fr" fo:country="FR"/>
    </style:style>
    <style:style style:name="P68" style:parent-style-name="Standard" style:family="paragraph">
      <style:text-properties style:font-name="Power Clear" fo:language="fr" fo:country="FR"/>
    </style:style>
    <style:style style:name="P69" style:parent-style-name="Standard" style:family="paragraph">
      <style:text-properties style:font-name="Power Clear" fo:language="fr" fo:country="FR"/>
    </style:style>
    <style:style style:name="P70" style:parent-style-name="Standard" style:family="paragraph">
      <style:text-properties style:font-name="Power Clear" fo:language="fr" fo:country="FR"/>
    </style:style>
    <style:style style:name="P71" style:parent-style-name="Standard" style:family="paragraph">
      <style:text-properties style:font-name="Power Clear" fo:language="fr" fo:country="FR"/>
    </style:style>
    <style:style style:name="T72" style:parent-style-name="DefaultParagraphFont" style:family="text">
      <style:text-properties style:font-name="Power Clear" fo:language="fr" fo:country="FR"/>
    </style:style>
    <style:style style:name="T73" style:parent-style-name="DefaultParagraphFont" style:family="text">
      <style:text-properties style:font-name="Cambria" style:font-name-complex="Cambria" fo:language="fr" fo:country="FR"/>
    </style:style>
    <style:style style:name="T74" style:parent-style-name="DefaultParagraphFont" style:family="text">
      <style:text-properties style:font-name="Power Clear" fo:language="fr" fo:country="FR"/>
    </style:style>
    <style:style style:name="P75" style:parent-style-name="Standard" style:family="paragraph">
      <style:text-properties style:font-name="Power Clear" fo:language="fr" fo:country="FR"/>
    </style:style>
    <style:style style:name="P76" style:parent-style-name="Standard" style:family="paragraph">
      <style:text-properties style:font-name="Power Clear" fo:language="fr" fo:country="FR"/>
    </style:style>
    <style:style style:name="P77" style:parent-style-name="Standard" style:family="paragraph">
      <style:text-properties style:font-name="Power Clear" fo:language="fr" fo:country="FR"/>
    </style:style>
    <style:style style:name="T78" style:parent-style-name="DefaultParagraphFont" style:family="text">
      <style:text-properties style:font-name="Power Clear" fo:language="fr" fo:country="FR"/>
    </style:style>
    <style:style style:name="T79" style:parent-style-name="DefaultParagraphFont" style:family="text">
      <style:text-properties style:font-name="Cambria" style:font-name-complex="Cambria" fo:language="fr" fo:country="FR"/>
    </style:style>
    <style:style style:name="T80" style:parent-style-name="DefaultParagraphFont" style:family="text">
      <style:text-properties style:font-name="Power Clear" fo:language="fr" fo:country="FR"/>
    </style:style>
    <style:style style:name="P81" style:parent-style-name="Standard" style:family="paragraph">
      <style:text-properties style:font-name="Power Clear" fo:language="fr" fo:country="FR"/>
    </style:style>
    <style:style style:name="P82" style:parent-style-name="Standard" style:family="paragraph">
      <style:text-properties style:font-name="Power Clear" fo:language="fr" fo:country="FR"/>
    </style:style>
    <style:style style:name="P83" style:parent-style-name="Standard" style:family="paragraph">
      <style:text-properties style:font-name="Power Clear" fo:language="fr" fo:country="FR"/>
    </style:style>
    <style:style style:name="P84" style:parent-style-name="Standard" style:family="paragraph">
      <style:text-properties style:font-name="Power Clear" fo:language="fr" fo:country="FR"/>
    </style:style>
    <style:style style:name="P85" style:parent-style-name="Standard" style:family="paragraph">
      <style:text-properties style:font-name="Power Clear" fo:language="fr" fo:country="FR"/>
    </style:style>
    <style:style style:name="P86" style:parent-style-name="Standard" style:family="paragraph">
      <style:text-properties style:font-name="Power Clear" fo:language="fr" fo:country="FR"/>
    </style:style>
    <style:style style:name="T87" style:parent-style-name="DefaultParagraphFont" style:family="text">
      <style:text-properties style:font-name="Power Clear" fo:language="fr" fo:country="FR"/>
    </style:style>
    <style:style style:name="T88" style:parent-style-name="DefaultParagraphFont" style:family="text">
      <style:text-properties style:font-name="Cambria" style:font-name-complex="Cambria" fo:language="fr" fo:country="FR"/>
    </style:style>
    <style:style style:name="T89" style:parent-style-name="DefaultParagraphFont" style:family="text">
      <style:text-properties style:font-name="Power Clear" fo:language="fr" fo:country="FR"/>
    </style:style>
    <style:style style:name="P90" style:parent-style-name="Standard" style:family="paragraph">
      <style:text-properties style:font-name="Power Clear" fo:language="fr" fo:country="FR"/>
    </style:style>
    <style:style style:name="P91" style:parent-style-name="Standard" style:family="paragraph">
      <style:text-properties style:font-name="Power Clear" fo:language="fr" fo:country="FR"/>
    </style:style>
    <style:style style:name="P92" style:parent-style-name="Standard" style:family="paragraph">
      <style:text-properties style:font-name="Power Clear" fo:language="fr" fo:country="FR"/>
    </style:style>
    <style:style style:name="P93" style:parent-style-name="Standard" style:family="paragraph">
      <style:text-properties style:font-name="Power Clear" fo:language="fr" fo:country="FR"/>
    </style:style>
    <style:style style:name="P94" style:parent-style-name="Standard" style:family="paragraph">
      <style:text-properties style:font-name="Power Clear" fo:language="fr" fo:country="FR"/>
    </style:style>
    <style:style style:name="P95" style:parent-style-name="Standard" style:family="paragraph">
      <style:text-properties style:font-name="Power Clear" fo:language="fr" fo:country="FR"/>
    </style:style>
    <style:style style:name="T96" style:parent-style-name="DefaultParagraphFont" style:family="text">
      <style:text-properties style:font-name="Power Clear" fo:language="fr" fo:country="FR"/>
    </style:style>
    <style:style style:name="T97" style:parent-style-name="DefaultParagraphFont" style:family="text">
      <style:text-properties style:font-name="Cambria" style:font-name-complex="Cambria" fo:language="fr" fo:country="FR"/>
    </style:style>
    <style:style style:name="T98" style:parent-style-name="DefaultParagraphFont" style:family="text">
      <style:text-properties style:font-name="Power Clear" fo:language="fr" fo:country="FR"/>
    </style:style>
    <style:style style:name="P99" style:parent-style-name="Standard" style:family="paragraph">
      <style:text-properties style:font-name="Power Clear" fo:language="fr" fo:country="FR"/>
    </style:style>
    <style:style style:name="P100" style:parent-style-name="Standard" style:family="paragraph">
      <style:text-properties style:font-name="Power Clear" fo:language="fr" fo:country="FR"/>
    </style:style>
    <style:style style:name="P101" style:parent-style-name="Standard" style:family="paragraph">
      <style:text-properties style:font-name="Power Clear" fo:language="fr" fo:country="FR"/>
    </style:style>
    <style:style style:name="P102" style:parent-style-name="Standard" style:family="paragraph">
      <style:text-properties style:font-name="Power Clear" fo:language="fr" fo:country="FR"/>
    </style:style>
    <style:style style:name="P103" style:parent-style-name="Standard" style:family="paragraph">
      <style:text-properties style:font-name="Power Clear" fo:language="fr" fo:country="FR"/>
    </style:style>
    <style:style style:name="P104" style:parent-style-name="Standard" style:family="paragraph">
      <style:text-properties style:font-name="Power Clear" fo:language="fr" fo:country="FR"/>
    </style:style>
    <style:style style:name="T105" style:parent-style-name="DefaultParagraphFont" style:family="text">
      <style:text-properties style:font-name="Power Clear" fo:language="fr" fo:country="FR"/>
    </style:style>
    <style:style style:name="T106" style:parent-style-name="DefaultParagraphFont" style:family="text">
      <style:text-properties style:font-name="Cambria" style:font-name-complex="Cambria" fo:language="fr" fo:country="FR"/>
    </style:style>
    <style:style style:name="T107" style:parent-style-name="DefaultParagraphFont" style:family="text">
      <style:text-properties style:font-name="Power Clear" fo:language="fr" fo:country="FR"/>
    </style:style>
    <style:style style:name="P108" style:parent-style-name="Standard" style:family="paragraph">
      <style:text-properties style:font-name="Power Clear" fo:language="fr" fo:country="FR"/>
    </style:style>
    <style:style style:name="T109" style:parent-style-name="DefaultParagraphFont" style:family="text">
      <style:text-properties style:font-name="Power Clear" fo:language="fr" fo:country="FR"/>
    </style:style>
    <style:style style:name="T110" style:parent-style-name="DefaultParagraphFont" style:family="text">
      <style:text-properties style:font-name="Cambria" style:font-name-complex="Cambria" fo:language="fr" fo:country="FR"/>
    </style:style>
    <style:style style:name="T111" style:parent-style-name="DefaultParagraphFont" style:family="text">
      <style:text-properties style:font-name="Power Clear" fo:language="fr" fo:country="FR"/>
    </style:style>
    <style:style style:name="P112" style:parent-style-name="Standard" style:family="paragraph">
      <style:text-properties style:font-name="Power Clear" fo:language="fr" fo:country="FR"/>
    </style:style>
    <style:style style:name="P113" style:parent-style-name="Standard" style:family="paragraph">
      <style:text-properties style:font-name="Power Clear" fo:language="fr" fo:country="FR"/>
    </style:style>
    <style:style style:name="P114" style:parent-style-name="Standard" style:family="paragraph">
      <style:text-properties style:font-name="Power Clear" fo:language="fr" fo:country="FR"/>
    </style:style>
    <style:style style:name="P115" style:parent-style-name="Standard" style:family="paragraph">
      <style:text-properties style:font-name="Power Clear" fo:language="fr" fo:country="FR"/>
    </style:style>
    <style:style style:name="P116" style:parent-style-name="Standard" style:family="paragraph">
      <style:text-properties style:font-name="Power Clear" fo:language="fr" fo:country="FR"/>
    </style:style>
    <style:style style:name="T117" style:parent-style-name="DefaultParagraphFont" style:family="text">
      <style:text-properties style:font-name="Power Clear" fo:language="fr" fo:country="FR"/>
    </style:style>
    <style:style style:name="T118" style:parent-style-name="DefaultParagraphFont" style:family="text">
      <style:text-properties style:font-name="Cambria" style:font-name-complex="Cambria" fo:language="fr" fo:country="FR"/>
    </style:style>
    <style:style style:name="T119" style:parent-style-name="DefaultParagraphFont" style:family="text">
      <style:text-properties style:font-name="Power Clear" fo:language="fr" fo:country="FR"/>
    </style:style>
    <style:style style:name="P120" style:parent-style-name="Standard" style:family="paragraph">
      <style:text-properties style:font-name="Power Clear" fo:language="fr" fo:country="FR"/>
    </style:style>
    <style:style style:name="P121" style:parent-style-name="Standard" style:family="paragraph">
      <style:text-properties style:font-name="Power Clear" fo:language="fr" fo:country="FR"/>
    </style:style>
    <style:style style:name="T122" style:parent-style-name="DefaultParagraphFont" style:family="text">
      <style:text-properties style:font-name="Power Clear" fo:language="fr" fo:country="FR"/>
    </style:style>
    <style:style style:name="T123" style:parent-style-name="DefaultParagraphFont" style:family="text">
      <style:text-properties style:font-name="Cambria" style:font-name-complex="Cambria" fo:language="fr" fo:country="FR"/>
    </style:style>
    <style:style style:name="T124" style:parent-style-name="DefaultParagraphFont" style:family="text">
      <style:text-properties style:font-name="Power Clear" fo:language="fr" fo:country="FR"/>
    </style:style>
    <style:style style:name="P125" style:parent-style-name="Standard" style:family="paragraph">
      <style:text-properties style:font-name="Power Clear" fo:language="fr" fo:country="FR"/>
    </style:style>
    <style:style style:name="P126" style:parent-style-name="Standard" style:family="paragraph">
      <style:text-properties style:font-name="Power Clear" fo:language="fr" fo:country="FR"/>
    </style:style>
    <style:style style:name="P127" style:parent-style-name="Standard" style:family="paragraph">
      <style:text-properties style:font-name="Power Clear" fo:language="fr" fo:country="FR"/>
    </style:style>
    <style:style style:name="P128" style:parent-style-name="Standard" style:family="paragraph">
      <style:text-properties style:font-name="Power Clear" fo:language="fr" fo:country="FR"/>
    </style:style>
    <style:style style:name="P129" style:parent-style-name="Standard" style:family="paragraph">
      <style:text-properties style:font-name="Power Clear" fo:language="fr" fo:country="FR"/>
    </style:style>
    <style:style style:name="P130" style:parent-style-name="Standard" style:family="paragraph">
      <style:text-properties style:font-name="Power Clear" fo:language="fr" fo:country="FR"/>
    </style:style>
    <style:style style:name="P131" style:parent-style-name="Standard" style:family="paragraph">
      <style:text-properties style:font-name="Power Clear" fo:language="fr" fo:country="FR"/>
    </style:style>
    <style:style style:name="P132" style:parent-style-name="Standard" style:family="paragraph">
      <style:text-properties style:font-name="Power Clear" fo:language="fr" fo:country="FR"/>
    </style:style>
    <style:style style:name="T133" style:parent-style-name="DefaultParagraphFont" style:family="text">
      <style:text-properties style:font-name="Power Clear" fo:language="fr" fo:country="FR"/>
    </style:style>
    <style:style style:name="T134" style:parent-style-name="DefaultParagraphFont" style:family="text">
      <style:text-properties style:font-name="Cambria" style:font-name-complex="Cambria" fo:language="fr" fo:country="FR"/>
    </style:style>
    <style:style style:name="T135" style:parent-style-name="DefaultParagraphFont" style:family="text">
      <style:text-properties style:font-name="Power Clear" fo:language="fr" fo:country="FR"/>
    </style:style>
    <style:style style:name="P136" style:parent-style-name="Standard" style:family="paragraph">
      <style:text-properties style:font-name="Power Clear" fo:language="fr" fo:country="FR"/>
    </style:style>
    <style:style style:name="P137" style:parent-style-name="Standard" style:family="paragraph">
      <style:text-properties style:font-name="Power Clear" fo:language="fr" fo:country="FR"/>
    </style:style>
    <style:style style:name="T138" style:parent-style-name="DefaultParagraphFont" style:family="text">
      <style:text-properties style:font-name="Power Clear" fo:language="fr" fo:country="FR"/>
    </style:style>
    <style:style style:name="T139" style:parent-style-name="DefaultParagraphFont" style:family="text">
      <style:text-properties style:font-name="Cambria" style:font-name-complex="Cambria" fo:language="fr" fo:country="FR"/>
    </style:style>
    <style:style style:name="T140" style:parent-style-name="DefaultParagraphFont" style:family="text">
      <style:text-properties style:font-name="Power Clear" fo:language="fr" fo:country="FR"/>
    </style:style>
    <style:style style:name="P141" style:parent-style-name="Standard" style:family="paragraph">
      <style:text-properties style:font-name="Power Clear" fo:language="fr" fo:country="FR"/>
    </style:style>
    <style:style style:name="P142" style:parent-style-name="Standard" style:family="paragraph">
      <style:text-properties style:font-name="Power Clear" fo:language="fr" fo:country="FR"/>
    </style:style>
    <style:style style:name="P143" style:parent-style-name="Standard" style:family="paragraph">
      <style:text-properties style:font-name="Power Clear" fo:language="fr" fo:country="FR"/>
    </style:style>
    <style:style style:name="P144" style:parent-style-name="Standard" style:family="paragraph">
      <style:text-properties style:font-name="Power Clear" fo:language="fr" fo:country="FR"/>
    </style:style>
    <style:style style:name="P145" style:parent-style-name="Standard" style:family="paragraph">
      <style:text-properties style:font-name="Power Clear" fo:language="fr" fo:country="FR"/>
    </style:style>
    <style:style style:name="P146" style:parent-style-name="Standard" style:family="paragraph">
      <style:text-properties style:font-name="Power Clear" fo:language="fr" fo:country="FR"/>
    </style:style>
    <style:style style:name="P147" style:parent-style-name="Standard" style:family="paragraph">
      <style:text-properties style:font-name="Power Clear" fo:language="fr" fo:country="FR"/>
    </style:style>
    <style:style style:name="P148" style:parent-style-name="Standard" style:family="paragraph">
      <style:text-properties style:font-name="Power Clear" fo:language="fr" fo:country="FR"/>
    </style:style>
    <style:style style:name="P149" style:parent-style-name="Standard" style:family="paragraph">
      <style:text-properties style:font-name="Power Clear" fo:language="fr" fo:country="FR"/>
    </style:style>
    <style:style style:name="P150" style:parent-style-name="Standard" style:family="paragraph">
      <style:text-properties style:font-name="Power Clear" fo:language="fr" fo:country="FR"/>
    </style:style>
    <style:style style:name="P151" style:parent-style-name="Standard" style:family="paragraph">
      <style:text-properties style:font-name="Power Clear" fo:language="fr" fo:country="FR"/>
    </style:style>
    <style:style style:name="P152" style:parent-style-name="Standard" style:family="paragraph">
      <style:text-properties style:font-name="Power Clear" fo:language="fr" fo:country="FR"/>
    </style:style>
    <style:style style:name="P153" style:parent-style-name="Standard" style:family="paragraph">
      <style:text-properties style:font-name="Power Clear" fo:language="fr" fo:country="FR"/>
    </style:style>
    <style:style style:name="T154" style:parent-style-name="DefaultParagraphFont" style:family="text">
      <style:text-properties style:font-name="Power Clear" fo:language="fr" fo:country="FR"/>
    </style:style>
    <style:style style:name="T155" style:parent-style-name="DefaultParagraphFont" style:family="text">
      <style:text-properties style:font-name="Cambria" style:font-name-complex="Cambria" fo:language="fr" fo:country="FR"/>
    </style:style>
    <style:style style:name="T156" style:parent-style-name="DefaultParagraphFont" style:family="text">
      <style:text-properties style:font-name="Power Clear" fo:language="fr" fo:country="FR"/>
    </style:style>
    <style:style style:name="P157" style:parent-style-name="Standard" style:family="paragraph">
      <style:text-properties style:font-name="Power Clear" fo:language="fr" fo:country="FR"/>
    </style:style>
    <style:style style:name="P158" style:parent-style-name="Standard" style:family="paragraph">
      <style:text-properties style:font-name="Power Clear" fo:language="fr" fo:country="FR"/>
    </style:style>
    <style:style style:name="P159" style:parent-style-name="Standard" style:family="paragraph">
      <style:text-properties style:font-name="Power Clear" fo:language="fr" fo:country="FR"/>
    </style:style>
    <style:style style:name="T160" style:parent-style-name="DefaultParagraphFont" style:family="text">
      <style:text-properties style:font-name="Power Clear" fo:language="fr" fo:country="FR"/>
    </style:style>
    <style:style style:name="T161" style:parent-style-name="DefaultParagraphFont" style:family="text">
      <style:text-properties style:font-name="Cambria" style:font-name-complex="Cambria" fo:language="fr" fo:country="FR"/>
    </style:style>
    <style:style style:name="T162" style:parent-style-name="DefaultParagraphFont" style:family="text">
      <style:text-properties style:font-name="Power Clear" fo:language="fr" fo:country="FR"/>
    </style:style>
    <style:style style:name="T163" style:parent-style-name="DefaultParagraphFont" style:family="text">
      <style:text-properties style:font-name="Cambria" style:font-name-complex="Cambria" fo:language="fr" fo:country="FR"/>
    </style:style>
    <style:style style:name="T164" style:parent-style-name="DefaultParagraphFont" style:family="text">
      <style:text-properties style:font-name="Power Clear" fo:language="fr" fo:country="FR"/>
    </style:style>
    <style:style style:name="T165" style:parent-style-name="DefaultParagraphFont" style:family="text">
      <style:text-properties style:font-name="Cambria" style:font-name-complex="Cambria" fo:language="fr" fo:country="FR"/>
    </style:style>
    <style:style style:name="T166" style:parent-style-name="DefaultParagraphFont" style:family="text">
      <style:text-properties style:font-name="Power Clear" fo:language="fr" fo:country="FR"/>
    </style:style>
    <style:style style:name="T167" style:parent-style-name="DefaultParagraphFont" style:family="text">
      <style:text-properties style:font-name="Cambria" style:font-name-complex="Cambria" fo:language="fr" fo:country="FR"/>
    </style:style>
    <style:style style:name="T168" style:parent-style-name="DefaultParagraphFont" style:family="text">
      <style:text-properties style:font-name="Power Clear" fo:language="fr" fo:country="FR"/>
    </style:style>
    <style:style style:name="P169" style:parent-style-name="Standard" style:family="paragraph">
      <style:text-properties style:font-name="Power Clear" fo:language="fr" fo:country="FR"/>
    </style:style>
    <style:style style:name="P170" style:parent-style-name="Standard" style:family="paragraph">
      <style:text-properties style:font-name="Power Clear" fo:language="fr" fo:country="FR"/>
    </style:style>
    <style:style style:name="P171" style:parent-style-name="Standard" style:family="paragraph">
      <style:text-properties style:font-name="Power Clear" fo:language="fr" fo:country="FR"/>
    </style:style>
    <style:style style:name="T172" style:parent-style-name="DefaultParagraphFont" style:family="text">
      <style:text-properties style:font-name="Power Clear" fo:language="fr" fo:country="FR"/>
    </style:style>
    <style:style style:name="P173" style:parent-style-name="Standard" style:family="paragraph">
      <style:text-properties style:font-name="Power Clear" fo:language="fr" fo:country="FR"/>
    </style:style>
    <style:style style:name="T174" style:parent-style-name="DefaultParagraphFont" style:family="text">
      <style:text-properties style:font-name="Power Clear" fo:language="fr" fo:country="FR"/>
    </style:style>
    <style:style style:name="T175" style:parent-style-name="DefaultParagraphFont" style:family="text">
      <style:text-properties style:font-name="Cambria" style:font-name-complex="Cambria" fo:language="fr" fo:country="FR"/>
    </style:style>
    <style:style style:name="T176" style:parent-style-name="DefaultParagraphFont" style:family="text">
      <style:text-properties style:font-name="Power Clear" fo:language="fr" fo:country="FR"/>
    </style:style>
    <style:style style:name="P177" style:parent-style-name="Standard" style:family="paragraph">
      <style:text-properties style:font-name="Power Clear"/>
    </style:style>
    <style:style style:name="P178" style:parent-style-name="Standard" style:family="paragraph">
      <style:text-properties style:font-name="Power Clear" fo:language="fr" fo:country="FR"/>
    </style:style>
    <style:style style:name="P179" style:parent-style-name="Standard" style:family="paragraph">
      <style:text-properties style:font-name="Power Clear" fo:language="fr" fo:country="FR"/>
    </style:style>
    <style:style style:name="P180" style:parent-style-name="Standard" style:family="paragraph">
      <style:text-properties style:font-name="Power Clear" fo:language="fr" fo:country="FR"/>
    </style:style>
    <style:style style:name="P181" style:parent-style-name="Standard" style:family="paragraph">
      <style:text-properties style:font-name="Power Clear" fo:language="fr" fo:country="FR"/>
    </style:style>
    <style:style style:name="P182" style:parent-style-name="Standard" style:family="paragraph">
      <style:text-properties style:font-name="Power Clear" fo:language="fr" fo:country="FR"/>
    </style:style>
    <style:style style:name="P183" style:parent-style-name="Standard" style:family="paragraph">
      <style:text-properties style:font-name="Power Clear" fo:language="fr" fo:country="FR"/>
    </style:style>
    <style:style style:name="P184" style:parent-style-name="Standard" style:family="paragraph">
      <style:text-properties style:font-name="Power Clear" fo:language="fr" fo:country="FR"/>
    </style:style>
    <style:style style:name="P185" style:parent-style-name="Standard" style:family="paragraph">
      <style:text-properties style:font-name="Power Clear" fo:language="fr" fo:country="FR"/>
    </style:style>
    <style:style style:name="P186" style:parent-style-name="Standard" style:family="paragraph">
      <style:text-properties style:font-name="Power Clear" fo:language="fr" fo:country="FR"/>
    </style:style>
    <style:style style:name="P187" style:parent-style-name="Standard" style:family="paragraph">
      <style:text-properties style:font-name="Power Clear" fo:language="fr" fo:country="FR"/>
    </style:style>
    <style:style style:name="P188" style:parent-style-name="Standard" style:family="paragraph">
      <style:text-properties style:font-name="Power Clear" fo:language="fr" fo:country="FR"/>
    </style:style>
    <style:style style:name="T189" style:parent-style-name="DefaultParagraphFont" style:family="text">
      <style:text-properties style:font-name="Power Clear" fo:language="fr" fo:country="FR"/>
    </style:style>
    <style:style style:name="T190" style:parent-style-name="DefaultParagraphFont" style:family="text">
      <style:text-properties style:font-name="Cambria" style:font-name-complex="Cambria" fo:language="fr" fo:country="FR"/>
    </style:style>
    <style:style style:name="T191" style:parent-style-name="DefaultParagraphFont" style:family="text">
      <style:text-properties style:font-name="Power Clear" fo:language="fr" fo:country="FR"/>
    </style:style>
    <style:style style:name="P192" style:parent-style-name="Standard" style:family="paragraph">
      <style:text-properties style:font-name="Power Clear" fo:language="fr" fo:country="FR"/>
    </style:style>
    <style:style style:name="P193" style:parent-style-name="Standard" style:family="paragraph">
      <style:text-properties style:font-name="Power Clear" fo:language="fr" fo:country="FR"/>
    </style:style>
    <style:style style:name="P194" style:parent-style-name="Standard" style:family="paragraph">
      <style:text-properties style:font-name="Power Clear" fo:language="fr" fo:country="FR"/>
    </style:style>
    <style:style style:name="P195" style:parent-style-name="Standard" style:family="paragraph">
      <style:text-properties style:font-name="Power Clear" fo:language="fr" fo:country="FR"/>
    </style:style>
    <style:style style:name="P196" style:parent-style-name="Standard" style:family="paragraph">
      <style:text-properties style:font-name="Power Clear" fo:language="fr" fo:country="FR"/>
    </style:style>
    <style:style style:name="P197" style:parent-style-name="Standard" style:family="paragraph">
      <style:text-properties style:font-name="Power Clear" fo:language="fr" fo:country="FR"/>
    </style:style>
    <style:style style:name="T198" style:parent-style-name="DefaultParagraphFont" style:family="text">
      <style:text-properties style:font-name="Power Clear" fo:language="fr" fo:country="FR"/>
    </style:style>
    <style:style style:name="T199" style:parent-style-name="DefaultParagraphFont" style:family="text">
      <style:text-properties style:font-name="Cambria" style:font-name-complex="Cambria" fo:language="fr" fo:country="FR"/>
    </style:style>
    <style:style style:name="T200" style:parent-style-name="DefaultParagraphFont" style:family="text">
      <style:text-properties style:font-name="Power Clear" fo:language="fr" fo:country="FR"/>
    </style:style>
    <style:style style:name="P201" style:parent-style-name="Standard" style:family="paragraph">
      <style:text-properties style:font-name="Power Clear" fo:language="fr" fo:country="FR"/>
    </style:style>
    <style:style style:name="P202" style:parent-style-name="Standard" style:family="paragraph">
      <style:text-properties style:font-name="Power Clear" fo:language="fr" fo:country="FR"/>
    </style:style>
    <style:style style:name="P203" style:parent-style-name="Standard" style:family="paragraph">
      <style:text-properties style:font-name="Power Clear" fo:language="fr" fo:country="FR"/>
    </style:style>
    <style:style style:name="P204" style:parent-style-name="Standard" style:family="paragraph">
      <style:text-properties style:font-name="Power Clear" fo:language="fr" fo:country="FR"/>
    </style:style>
    <style:style style:name="P205" style:parent-style-name="Standard" style:family="paragraph">
      <style:text-properties style:font-name="Power Clear" fo:language="fr" fo:country="FR"/>
    </style:style>
    <style:style style:name="P206" style:parent-style-name="Standard" style:family="paragraph">
      <style:text-properties style:font-name="Power Clear" fo:language="fr" fo:country="FR"/>
    </style:style>
    <style:style style:name="P207" style:parent-style-name="Standard" style:family="paragraph">
      <style:text-properties style:font-name="Power Clear" fo:language="fr" fo:country="FR"/>
    </style:style>
    <style:style style:name="P208" style:parent-style-name="Standard" style:family="paragraph">
      <style:text-properties style:font-name="Power Clear" fo:language="fr" fo:country="FR"/>
    </style:style>
    <style:style style:name="P209" style:parent-style-name="Standard" style:family="paragraph">
      <style:text-properties style:font-name="Power Clear" fo:language="fr" fo:country="FR"/>
    </style:style>
    <style:style style:name="P210" style:parent-style-name="Standard" style:family="paragraph">
      <style:text-properties style:font-name="Power Clear" fo:language="fr" fo:country="FR"/>
    </style:style>
    <style:style style:name="P211" style:parent-style-name="Standard" style:family="paragraph">
      <style:text-properties style:font-name="Power Clear" fo:language="fr" fo:country="FR"/>
    </style:style>
    <style:style style:name="P212" style:parent-style-name="Standard" style:family="paragraph">
      <style:text-properties style:font-name="Power Clear" fo:language="fr" fo:country="FR"/>
    </style:style>
    <style:style style:name="P213" style:parent-style-name="Standard" style:family="paragraph">
      <style:text-properties style:font-name="Power Clear" fo:language="fr" fo:country="FR"/>
    </style:style>
    <style:style style:name="T214" style:parent-style-name="DefaultParagraphFont" style:family="text">
      <style:text-properties style:font-name="Power Clear" fo:language="fr" fo:country="FR"/>
    </style:style>
    <style:style style:name="T215" style:parent-style-name="DefaultParagraphFont" style:family="text">
      <style:text-properties style:font-name="Cambria" style:font-name-complex="Cambria" fo:language="fr" fo:country="FR"/>
    </style:style>
    <style:style style:name="T216" style:parent-style-name="DefaultParagraphFont" style:family="text">
      <style:text-properties style:font-name="Power Clear" fo:language="fr" fo:country="FR"/>
    </style:style>
    <style:style style:name="T217" style:parent-style-name="DefaultParagraphFont" style:family="text">
      <style:text-properties style:font-name="Cambria" style:font-name-complex="Cambria" fo:language="fr" fo:country="FR"/>
    </style:style>
    <style:style style:name="T218" style:parent-style-name="DefaultParagraphFont" style:family="text">
      <style:text-properties style:font-name="Power Clear" style:font-name-complex="Power Clear" fo:language="fr" fo:country="FR"/>
    </style:style>
    <style:style style:name="T219" style:parent-style-name="DefaultParagraphFont" style:family="text">
      <style:text-properties style:font-name="Power Clear" fo:language="fr" fo:country="FR"/>
    </style:style>
    <style:style style:name="P220" style:parent-style-name="Standard" style:family="paragraph">
      <style:text-properties style:font-name="Power Clear" fo:language="fr" fo:country="FR"/>
    </style:style>
    <style:style style:name="T221" style:parent-style-name="DefaultParagraphFont" style:family="text">
      <style:text-properties style:font-name="Power Clear" fo:language="fr" fo:country="FR"/>
    </style:style>
    <style:style style:name="T222" style:parent-style-name="DefaultParagraphFont" style:family="text">
      <style:text-properties style:font-name="Cambria" style:font-name-complex="Cambria" fo:language="fr" fo:country="FR"/>
    </style:style>
    <style:style style:name="T223" style:parent-style-name="DefaultParagraphFont" style:family="text">
      <style:text-properties style:font-name="Power Clear" fo:language="fr" fo:country="FR"/>
    </style:style>
    <style:style style:name="P224" style:parent-style-name="Standard" style:family="paragraph">
      <style:text-properties style:font-name="Power Clear" fo:language="fr" fo:country="FR"/>
    </style:style>
    <style:style style:name="P225" style:parent-style-name="Standard" style:family="paragraph">
      <style:text-properties style:font-name="Power Clear" fo:language="fr" fo:country="FR"/>
    </style:style>
    <style:style style:name="P226" style:parent-style-name="Standard" style:family="paragraph">
      <style:text-properties style:font-name="Power Clear" fo:language="fr" fo:country="FR"/>
    </style:style>
    <style:style style:name="T227" style:parent-style-name="DefaultParagraphFont" style:family="text">
      <style:text-properties style:font-name="Power Clear" fo:language="fr" fo:country="FR"/>
    </style:style>
    <style:style style:name="T228" style:parent-style-name="DefaultParagraphFont" style:family="text">
      <style:text-properties style:font-name="Cambria" style:font-name-complex="Cambria" fo:language="fr" fo:country="FR"/>
    </style:style>
    <style:style style:name="T229" style:parent-style-name="DefaultParagraphFont" style:family="text">
      <style:text-properties style:font-name="Power Clear" fo:language="fr" fo:country="FR"/>
    </style:style>
    <style:style style:name="P230" style:parent-style-name="Standard" style:family="paragraph">
      <style:text-properties style:font-name="Power Clear" fo:language="fr" fo:country="FR"/>
    </style:style>
    <style:style style:name="P231" style:parent-style-name="Standard" style:family="paragraph">
      <style:text-properties style:font-name="Power Clear" fo:language="fr" fo:country="FR"/>
    </style:style>
    <style:style style:name="P232" style:parent-style-name="Standard" style:family="paragraph">
      <style:text-properties style:font-name="Power Clear" fo:language="fr" fo:country="FR"/>
    </style:style>
    <style:style style:name="P233" style:parent-style-name="Standard" style:family="paragraph">
      <style:text-properties style:font-name="Power Clear" fo:language="fr" fo:country="FR"/>
    </style:style>
    <style:style style:name="P234" style:parent-style-name="Standard" style:family="paragraph">
      <style:text-properties style:font-name="Power Clear" fo:language="fr" fo:country="FR"/>
    </style:style>
    <style:style style:name="P235" style:parent-style-name="Standard" style:family="paragraph">
      <style:text-properties style:font-name="Power Clear" fo:language="fr" fo:country="FR"/>
    </style:style>
    <style:style style:name="P236" style:parent-style-name="Standard" style:family="paragraph">
      <style:text-properties style:font-name="Power Clear" fo:language="fr" fo:country="FR"/>
    </style:style>
    <style:style style:name="P237" style:parent-style-name="Standard" style:family="paragraph">
      <style:text-properties style:font-name="Power Clear" fo:language="fr" fo:country="FR"/>
    </style:style>
    <style:style style:name="P238" style:parent-style-name="Standard" style:family="paragraph">
      <style:text-properties style:font-name="Power Clear" fo:language="fr" fo:country="FR"/>
    </style:style>
    <style:style style:name="P239" style:parent-style-name="Standard" style:family="paragraph">
      <style:text-properties style:font-name="Power Clear" fo:language="fr" fo:country="FR"/>
    </style:style>
    <style:style style:name="P240" style:parent-style-name="Standard" style:family="paragraph">
      <style:text-properties style:font-name="Power Clear" fo:language="fr" fo:country="FR"/>
    </style:style>
    <style:style style:name="P241" style:parent-style-name="Standard" style:family="paragraph">
      <style:text-properties style:font-name="Power Clear" fo:language="fr" fo:country="FR"/>
    </style:style>
    <style:style style:name="P242" style:parent-style-name="Standard" style:family="paragraph">
      <style:text-properties style:font-name="Power Clear" fo:language="fr" fo:country="FR"/>
    </style:style>
    <style:style style:name="P243" style:parent-style-name="Standard" style:family="paragraph">
      <style:text-properties style:font-name="Power Clear" fo:language="fr" fo:country="FR"/>
    </style:style>
    <style:style style:name="P244" style:parent-style-name="Standard" style:family="paragraph">
      <style:text-properties style:font-name="Power Clear" fo:language="fr" fo:country="FR"/>
    </style:style>
    <style:style style:name="P245" style:parent-style-name="Standard" style:family="paragraph">
      <style:text-properties style:font-name="Power Clear" fo:language="fr" fo:country="FR"/>
    </style:style>
    <style:style style:name="P246" style:parent-style-name="Standard" style:family="paragraph">
      <style:text-properties style:font-name="Power Clear" fo:language="fr" fo:country="FR"/>
    </style:style>
    <style:style style:name="T247" style:parent-style-name="DefaultParagraphFont" style:family="text">
      <style:text-properties style:font-name="Power Clear" fo:language="fr" fo:country="FR"/>
    </style:style>
    <style:style style:name="T248" style:parent-style-name="DefaultParagraphFont" style:family="text">
      <style:text-properties style:font-name="Cambria" style:font-name-complex="Cambria" fo:language="fr" fo:country="FR"/>
    </style:style>
    <style:style style:name="T249" style:parent-style-name="DefaultParagraphFont" style:family="text">
      <style:text-properties style:font-name="Power Clear" fo:language="fr" fo:country="FR"/>
    </style:style>
    <style:style style:name="P250" style:parent-style-name="Standard" style:family="paragraph">
      <style:text-properties style:font-name="Power Clear" fo:language="fr" fo:country="FR"/>
    </style:style>
    <style:style style:name="P251" style:parent-style-name="Standard" style:family="paragraph">
      <style:text-properties style:font-name="Power Clear" fo:language="fr" fo:country="FR"/>
    </style:style>
    <style:style style:name="P252" style:parent-style-name="Standard" style:family="paragraph">
      <style:text-properties style:font-name="Power Clear" fo:language="fr" fo:country="FR"/>
    </style:style>
    <style:style style:name="P253" style:parent-style-name="Standard" style:family="paragraph">
      <style:text-properties style:font-name="Power Clear" fo:language="fr" fo:country="FR"/>
    </style:style>
    <style:style style:name="P254" style:parent-style-name="Standard" style:family="paragraph">
      <style:text-properties style:font-name="Power Clear" fo:language="fr" fo:country="FR"/>
    </style:style>
    <style:style style:name="P255" style:parent-style-name="Standard" style:family="paragraph">
      <style:text-properties style:font-name="Power Clear" fo:language="fr" fo:country="FR"/>
    </style:style>
    <style:style style:name="P256" style:parent-style-name="Standard" style:family="paragraph">
      <style:text-properties style:font-name="Power Clear" fo:language="fr" fo:country="FR"/>
    </style:style>
    <style:style style:name="P257" style:parent-style-name="Standard" style:family="paragraph">
      <style:text-properties style:font-name="Power Clear" fo:language="fr" fo:country="FR"/>
    </style:style>
    <style:style style:name="P258" style:parent-style-name="Standard" style:family="paragraph">
      <style:text-properties style:font-name="Power Clear" fo:language="fr" fo:country="FR"/>
    </style:style>
    <style:style style:name="P259" style:parent-style-name="Standard" style:family="paragraph">
      <style:text-properties style:font-name="Power Clear" fo:language="fr" fo:country="FR"/>
    </style:style>
    <style:style style:name="P260" style:parent-style-name="Standard" style:family="paragraph">
      <style:text-properties style:font-name="Power Clear" fo:language="fr" fo:country="FR"/>
    </style:style>
    <style:style style:name="P261" style:parent-style-name="Standard" style:family="paragraph">
      <style:text-properties style:font-name="Power Clear" fo:language="fr" fo:country="FR"/>
    </style:style>
    <style:style style:name="P262" style:parent-style-name="Standard" style:family="paragraph">
      <style:text-properties style:font-name="Power Clear" fo:language="fr" fo:country="FR"/>
    </style:style>
    <style:style style:name="P263" style:parent-style-name="Standard" style:family="paragraph">
      <style:text-properties style:font-name="Power Clear" fo:language="fr" fo:country="FR"/>
    </style:style>
    <style:style style:name="P264" style:parent-style-name="Standard" style:family="paragraph">
      <style:text-properties style:font-name="Power Clear" fo:language="fr" fo:country="FR"/>
    </style:style>
    <style:style style:name="P265" style:parent-style-name="Standard" style:family="paragraph">
      <style:text-properties style:font-name="Power Clear" fo:language="fr" fo:country="FR"/>
    </style:style>
    <style:style style:name="P266" style:parent-style-name="Standard" style:family="paragraph">
      <style:text-properties style:font-name="Power Clear" fo:language="fr" fo:country="FR"/>
    </style:style>
    <style:style style:name="P267" style:parent-style-name="Standard" style:family="paragraph">
      <style:text-properties style:font-name="Power Clear" fo:language="fr" fo:country="FR"/>
    </style:style>
    <style:style style:name="P268" style:parent-style-name="Standard" style:family="paragraph">
      <style:text-properties style:font-name="Power Clear" fo:language="fr" fo:country="FR"/>
    </style:style>
    <style:style style:name="P269" style:parent-style-name="Standard" style:family="paragraph">
      <style:text-properties style:font-name="Power Clear" fo:language="fr" fo:country="FR"/>
    </style:style>
    <style:style style:name="T270" style:parent-style-name="DefaultParagraphFont" style:family="text">
      <style:text-properties style:font-name="Power Clear" fo:language="fr" fo:country="FR"/>
    </style:style>
    <style:style style:name="T271" style:parent-style-name="DefaultParagraphFont" style:family="text">
      <style:text-properties style:font-name="Cambria" style:font-name-complex="Cambria" fo:language="fr" fo:country="FR"/>
    </style:style>
    <style:style style:name="T272" style:parent-style-name="DefaultParagraphFont" style:family="text">
      <style:text-properties style:font-name="Power Clear" fo:language="fr" fo:country="FR"/>
    </style:style>
    <style:style style:name="P273" style:parent-style-name="Standard" style:family="paragraph">
      <style:text-properties style:font-name="Power Clear" fo:language="fr" fo:country="FR"/>
    </style:style>
    <style:style style:name="P274" style:parent-style-name="Standard" style:family="paragraph">
      <style:text-properties style:font-name="Power Clear" fo:language="fr" fo:country="FR"/>
    </style:style>
    <style:style style:name="P275" style:parent-style-name="Standard" style:family="paragraph">
      <style:text-properties style:font-name="Power Clear" fo:language="fr" fo:country="FR"/>
    </style:style>
    <style:style style:name="P276" style:parent-style-name="Standard" style:family="paragraph">
      <style:text-properties style:font-name="Power Clear" fo:language="fr" fo:country="FR"/>
    </style:style>
    <style:style style:name="P277" style:parent-style-name="Standard" style:family="paragraph">
      <style:text-properties style:font-name="Power Clear" fo:language="fr" fo:country="FR"/>
    </style:style>
    <style:style style:name="P278" style:parent-style-name="Standard" style:family="paragraph">
      <style:text-properties style:font-name="Power Clear" fo:language="fr" fo:country="FR"/>
    </style:style>
    <style:style style:name="P279" style:parent-style-name="Standard" style:family="paragraph">
      <style:text-properties style:font-name="Power Clear" fo:language="fr" fo:country="FR"/>
    </style:style>
    <style:style style:name="P280" style:parent-style-name="Standard" style:family="paragraph">
      <style:text-properties style:font-name="Power Clear" fo:language="fr" fo:country="FR"/>
    </style:style>
    <style:style style:name="P281" style:parent-style-name="Standard" style:family="paragraph">
      <style:text-properties style:font-name="Power Clear" fo:language="fr" fo:country="FR"/>
    </style:style>
    <style:style style:name="P282" style:parent-style-name="Standard" style:family="paragraph">
      <style:text-properties style:font-name="Power Clear" fo:language="fr" fo:country="FR"/>
    </style:style>
    <style:style style:name="P283" style:parent-style-name="Standard" style:family="paragraph">
      <style:text-properties style:font-name="Power Clear" fo:language="fr" fo:country="FR"/>
    </style:style>
    <style:style style:name="P284" style:parent-style-name="Standard" style:family="paragraph">
      <style:text-properties style:font-name="Power Clear" fo:language="fr" fo:country="FR"/>
    </style:style>
    <style:style style:name="P285" style:parent-style-name="Standard" style:family="paragraph">
      <style:text-properties style:font-name="Power Clear" fo:language="fr" fo:country="FR"/>
    </style:style>
    <style:style style:name="P286" style:parent-style-name="Standard" style:family="paragraph">
      <style:text-properties style:font-name="Power Clear" fo:language="fr" fo:country="FR"/>
    </style:style>
    <style:style style:name="P287" style:parent-style-name="Standard" style:family="paragraph">
      <style:text-properties style:font-name="Power Clear" fo:language="fr" fo:country="FR"/>
    </style:style>
    <style:style style:name="P288" style:parent-style-name="Standard" style:family="paragraph">
      <style:text-properties style:font-name="Power Clear" fo:language="fr" fo:country="FR"/>
    </style:style>
    <style:style style:name="P289" style:parent-style-name="Standard" style:family="paragraph">
      <style:text-properties style:font-name="Power Clear" fo:language="fr" fo:country="FR"/>
    </style:style>
    <style:style style:name="T290" style:parent-style-name="DefaultParagraphFont" style:family="text">
      <style:text-properties style:font-name="Power Clear" fo:language="fr" fo:country="FR"/>
    </style:style>
    <style:style style:name="T291" style:parent-style-name="DefaultParagraphFont" style:family="text">
      <style:text-properties style:font-name="Cambria" style:font-name-complex="Cambria" fo:language="fr" fo:country="FR"/>
    </style:style>
    <style:style style:name="T292" style:parent-style-name="DefaultParagraphFont" style:family="text">
      <style:text-properties style:font-name="Power Clear" fo:language="fr" fo:country="FR"/>
    </style:style>
    <style:style style:name="P293" style:parent-style-name="Standard" style:family="paragraph">
      <style:text-properties style:font-name="Power Clear" fo:language="fr" fo:country="FR"/>
    </style:style>
    <style:style style:name="P294" style:parent-style-name="Standard" style:family="paragraph">
      <style:text-properties style:font-name="Power Clear" fo:language="fr" fo:country="FR"/>
    </style:style>
    <style:style style:name="P295" style:parent-style-name="Standard" style:family="paragraph">
      <style:text-properties style:font-name="Power Clear" fo:language="fr" fo:country="FR"/>
    </style:style>
    <style:style style:name="T296" style:parent-style-name="DefaultParagraphFont" style:family="text">
      <style:text-properties style:font-name="Power Clear" fo:language="fr" fo:country="FR"/>
    </style:style>
    <style:style style:name="T297" style:parent-style-name="DefaultParagraphFont" style:family="text">
      <style:text-properties style:font-name="Cambria" style:font-name-complex="Cambria" fo:language="fr" fo:country="FR"/>
    </style:style>
    <style:style style:name="T298" style:parent-style-name="DefaultParagraphFont" style:family="text">
      <style:text-properties style:font-name="Power Clear" fo:language="fr" fo:country="FR"/>
    </style:style>
    <style:style style:name="P299" style:parent-style-name="Standard" style:family="paragraph">
      <style:text-properties style:font-name="Power Clear" fo:language="fr" fo:country="FR"/>
    </style:style>
    <style:style style:name="P300" style:parent-style-name="Standard" style:family="paragraph">
      <style:text-properties style:font-name="Power Clear" fo:language="fr" fo:country="FR"/>
    </style:style>
    <style:style style:name="P301" style:parent-style-name="Standard" style:family="paragraph">
      <style:text-properties style:font-name="Power Clear" fo:language="fr" fo:country="FR"/>
    </style:style>
    <style:style style:name="T302" style:parent-style-name="DefaultParagraphFont" style:family="text">
      <style:text-properties style:font-name="Power Clear" fo:language="fr" fo:country="FR"/>
    </style:style>
    <style:style style:name="T303" style:parent-style-name="DefaultParagraphFont" style:family="text">
      <style:text-properties style:font-name="Cambria" style:font-name-complex="Cambria" fo:language="fr" fo:country="FR"/>
    </style:style>
    <style:style style:name="T304" style:parent-style-name="DefaultParagraphFont" style:family="text">
      <style:text-properties style:font-name="Power Clear" fo:language="fr" fo:country="FR"/>
    </style:style>
    <style:style style:name="P305" style:parent-style-name="Standard" style:family="paragraph">
      <style:text-properties style:font-name="Power Clear" fo:language="fr" fo:country="FR"/>
    </style:style>
    <style:style style:name="P306" style:parent-style-name="Standard" style:family="paragraph">
      <style:text-properties style:font-name="Power Clear" fo:language="fr" fo:country="FR"/>
    </style:style>
    <style:style style:name="P307" style:parent-style-name="Standard" style:family="paragraph">
      <style:text-properties style:font-name="Power Clear" fo:language="fr" fo:country="FR"/>
    </style:style>
    <style:style style:name="P308" style:parent-style-name="Standard" style:family="paragraph">
      <style:text-properties style:font-name="Power Clear" fo:language="fr" fo:country="FR"/>
    </style:style>
    <style:style style:name="P309" style:parent-style-name="Standard" style:family="paragraph">
      <style:text-properties style:font-name="Power Clear" fo:language="fr" fo:country="FR"/>
    </style:style>
    <style:style style:name="P310" style:parent-style-name="Standard" style:family="paragraph">
      <style:text-properties style:font-name="Power Clear" fo:language="fr" fo:country="FR"/>
    </style:style>
    <style:style style:name="P311" style:parent-style-name="Standard" style:family="paragraph">
      <style:text-properties style:font-name="Power Clear" fo:language="fr" fo:country="FR"/>
    </style:style>
    <style:style style:name="P312" style:parent-style-name="Standard" style:family="paragraph">
      <style:text-properties style:font-name="Power Clear" fo:language="fr" fo:country="FR"/>
    </style:style>
    <style:style style:name="P313" style:parent-style-name="Standard" style:family="paragraph">
      <style:text-properties style:font-name="Power Clear" fo:language="fr" fo:country="FR"/>
    </style:style>
    <style:style style:name="P314" style:parent-style-name="Standard" style:family="paragraph">
      <style:text-properties style:font-name="Power Clear" fo:language="fr" fo:country="FR"/>
    </style:style>
    <style:style style:name="T315" style:parent-style-name="DefaultParagraphFont" style:family="text">
      <style:text-properties style:font-name="Power Clear" fo:language="fr" fo:country="FR"/>
    </style:style>
    <style:style style:name="T316" style:parent-style-name="DefaultParagraphFont" style:family="text">
      <style:text-properties style:font-name="Power Clear" fo:language="fr" fo:country="FR"/>
    </style:style>
    <style:style style:name="T317" style:parent-style-name="DefaultParagraphFont" style:family="text">
      <style:text-properties style:font-name="Cambria" style:font-name-complex="Cambria" fo:language="fr" fo:country="FR"/>
    </style:style>
    <style:style style:name="T318" style:parent-style-name="DefaultParagraphFont" style:family="text">
      <style:text-properties style:font-name="Power Clear" fo:language="fr" fo:country="FR"/>
    </style:style>
    <style:style style:name="T319" style:parent-style-name="DefaultParagraphFont" style:family="text">
      <style:text-properties style:font-name="Power Clear" fo:language="fr" fo:country="FR"/>
    </style:style>
    <style:style style:name="P320" style:parent-style-name="Standard" style:family="paragraph">
      <style:text-properties style:font-name="Power Clear" fo:language="fr" fo:country="FR"/>
    </style:style>
    <style:style style:name="P321" style:parent-style-name="Standard" style:family="paragraph">
      <style:text-properties style:font-name="Power Clear" fo:language="fr" fo:country="FR"/>
    </style:style>
    <style:style style:name="P322" style:parent-style-name="Standard" style:family="paragraph">
      <style:text-properties style:font-name="Power Clear" fo:language="fr" fo:country="FR"/>
    </style:style>
    <style:style style:name="P323" style:parent-style-name="Standard" style:family="paragraph">
      <style:text-properties style:font-name="Power Clear" fo:language="fr" fo:country="FR"/>
    </style:style>
    <style:style style:name="P324" style:parent-style-name="Standard" style:family="paragraph">
      <style:text-properties style:font-name="Power Clear" fo:language="fr" fo:country="FR"/>
    </style:style>
    <style:style style:name="P325" style:parent-style-name="Standard" style:family="paragraph">
      <style:text-properties style:font-name="Power Clear" fo:language="fr" fo:country="FR"/>
    </style:style>
    <style:style style:name="P326" style:parent-style-name="Standard" style:family="paragraph">
      <style:text-properties style:font-name="Power Clear" fo:language="fr" fo:country="FR"/>
    </style:style>
    <style:style style:name="P327" style:parent-style-name="Standard" style:family="paragraph">
      <style:text-properties style:font-name="Power Clear" fo:language="fr" fo:country="FR"/>
    </style:style>
    <style:style style:name="P328" style:parent-style-name="Standard" style:family="paragraph">
      <style:text-properties style:font-name="Power Clear" fo:language="fr" fo:country="FR"/>
    </style:style>
    <style:style style:name="P329" style:parent-style-name="Standard" style:family="paragraph">
      <style:text-properties style:font-name="Power Clear" fo:language="fr" fo:country="FR"/>
    </style:style>
    <style:style style:name="P330" style:parent-style-name="Standard" style:family="paragraph">
      <style:text-properties style:font-name="Power Clear" fo:language="fr" fo:country="FR"/>
    </style:style>
    <style:style style:name="P331" style:parent-style-name="Standard" style:family="paragraph">
      <style:text-properties style:font-name="Power Clear" fo:language="fr" fo:country="FR"/>
    </style:style>
    <style:style style:name="P332" style:parent-style-name="Standard" style:family="paragraph">
      <style:text-properties style:font-name="Power Clear" fo:language="fr" fo:country="FR"/>
    </style:style>
    <style:style style:name="P333" style:parent-style-name="Standard" style:family="paragraph">
      <style:text-properties style:font-name="Power Clear" fo:language="fr" fo:country="FR"/>
    </style:style>
    <style:style style:name="P334" style:parent-style-name="Standard" style:family="paragraph">
      <style:text-properties style:font-name="Power Clear" fo:language="fr" fo:country="FR"/>
    </style:style>
    <style:style style:name="P335" style:parent-style-name="Standard" style:family="paragraph">
      <style:text-properties style:font-name="Power Clear" fo:language="fr" fo:country="FR"/>
    </style:style>
    <style:style style:name="P336" style:parent-style-name="Standard" style:family="paragraph">
      <style:text-properties style:font-name="Power Clear" fo:language="fr" fo:country="FR"/>
    </style:style>
    <style:style style:name="P337" style:parent-style-name="Standard" style:family="paragraph">
      <style:text-properties style:font-name="Power Clear" fo:language="fr" fo:country="FR"/>
    </style:style>
    <style:style style:name="P338" style:parent-style-name="Standard" style:family="paragraph">
      <style:text-properties style:font-name="Power Clear" fo:language="fr" fo:country="FR"/>
    </style:style>
    <style:style style:name="P339" style:parent-style-name="Standard" style:family="paragraph">
      <style:text-properties style:font-name="Power Clear" fo:language="fr" fo:country="FR"/>
    </style:style>
    <style:style style:name="P340" style:parent-style-name="Standard" style:family="paragraph">
      <style:text-properties style:font-name="Power Clear" fo:language="fr" fo:country="FR"/>
    </style:style>
    <style:style style:name="P341" style:parent-style-name="Standard" style:family="paragraph">
      <style:text-properties style:font-name="Power Clear" fo:language="fr" fo:country="FR"/>
    </style:style>
    <style:style style:name="P342" style:parent-style-name="Standard" style:family="paragraph">
      <style:text-properties style:font-name="Power Clear" fo:language="fr" fo:country="FR"/>
    </style:style>
    <style:style style:name="P343" style:parent-style-name="Standard" style:family="paragraph">
      <style:text-properties style:font-name="Power Clear" fo:language="fr" fo:country="FR"/>
    </style:style>
    <style:style style:name="P344" style:parent-style-name="Standard" style:family="paragraph">
      <style:text-properties style:font-name="Power Clear" fo:language="fr" fo:country="FR"/>
    </style:style>
    <style:style style:name="P345" style:parent-style-name="Standard" style:family="paragraph">
      <style:text-properties style:font-name="Power Clear" fo:language="fr" fo:country="FR"/>
    </style:style>
    <style:style style:name="P346" style:parent-style-name="Standard" style:family="paragraph">
      <style:text-properties style:font-name="Power Clear" fo:language="fr" fo:country="FR"/>
    </style:style>
    <style:style style:name="P347" style:parent-style-name="Standard" style:family="paragraph">
      <style:text-properties style:font-name="Power Clear" fo:language="fr" fo:country="FR"/>
    </style:style>
    <style:style style:name="P348" style:parent-style-name="Standard" style:family="paragraph">
      <style:text-properties style:font-name="Power Clear" fo:language="fr" fo:country="FR"/>
    </style:style>
    <style:style style:name="P349" style:parent-style-name="Standard" style:family="paragraph">
      <style:text-properties style:font-name="Power Clear" fo:language="fr" fo:country="FR"/>
    </style:style>
    <style:style style:name="P350" style:parent-style-name="Standard" style:family="paragraph">
      <style:text-properties style:font-name="Power Clear" fo:language="fr" fo:country="FR"/>
    </style:style>
    <style:style style:name="P351" style:parent-style-name="Standard" style:family="paragraph">
      <style:text-properties style:font-name="Power Clear" fo:language="fr" fo:country="FR"/>
    </style:style>
    <style:style style:name="P352" style:parent-style-name="Standard" style:family="paragraph">
      <style:text-properties style:font-name="Power Clear" fo:language="fr" fo:country="FR"/>
    </style:style>
    <style:style style:name="P353" style:parent-style-name="Standard" style:family="paragraph">
      <style:text-properties style:font-name="Power Clear" fo:language="fr" fo:country="FR"/>
    </style:style>
    <style:style style:name="P354" style:parent-style-name="Standard" style:family="paragraph">
      <style:text-properties style:font-name="Power Clear" fo:language="fr" fo:country="FR"/>
    </style:style>
    <style:style style:name="P355" style:parent-style-name="Standard" style:family="paragraph">
      <style:text-properties style:font-name="Power Clear" fo:language="fr" fo:country="FR"/>
    </style:style>
    <style:style style:name="P356" style:parent-style-name="Standard" style:family="paragraph">
      <style:text-properties style:font-name="Power Clear" fo:language="fr" fo:country="FR"/>
    </style:style>
    <style:style style:name="P357" style:parent-style-name="Standard" style:family="paragraph">
      <style:text-properties style:font-name="Power Clear" fo:language="fr" fo:country="FR"/>
    </style:style>
    <style:style style:name="P358" style:parent-style-name="Standard" style:family="paragraph">
      <style:text-properties style:font-name="Power Clear" fo:language="fr" fo:country="FR"/>
    </style:style>
    <style:style style:name="P359" style:parent-style-name="Standard" style:family="paragraph">
      <style:text-properties style:font-name="Power Clear" fo:language="fr" fo:country="FR"/>
    </style:style>
    <style:style style:name="P360" style:parent-style-name="Standard" style:family="paragraph">
      <style:text-properties style:font-name="Power Clear" fo:language="fr" fo:country="FR"/>
    </style:style>
    <style:style style:name="P361" style:parent-style-name="Standard" style:family="paragraph">
      <style:text-properties style:font-name="Power Clear" fo:language="fr" fo:country="FR"/>
    </style:style>
    <style:style style:name="P362" style:parent-style-name="Standard" style:family="paragraph">
      <style:text-properties style:font-name="Power Clear" fo:language="fr" fo:country="FR"/>
    </style:style>
    <style:style style:name="P363" style:parent-style-name="Standard" style:family="paragraph">
      <style:text-properties style:font-name="Power Clear" fo:language="fr" fo:country="FR"/>
    </style:style>
    <style:style style:name="T364" style:parent-style-name="DefaultParagraphFont" style:family="text">
      <style:text-properties style:font-name="Power Clear" fo:language="fr" fo:country="FR"/>
    </style:style>
    <style:style style:name="T365" style:parent-style-name="DefaultParagraphFont" style:family="text">
      <style:text-properties style:font-name="Cambria" style:font-name-complex="Cambria" fo:language="fr" fo:country="FR"/>
    </style:style>
    <style:style style:name="T366" style:parent-style-name="DefaultParagraphFont" style:family="text">
      <style:text-properties style:font-name="Power Clear" fo:language="fr" fo:country="FR"/>
    </style:style>
    <style:style style:name="P367" style:parent-style-name="Standard" style:family="paragraph">
      <style:text-properties style:font-name="Power Clear" fo:language="fr" fo:country="FR"/>
    </style:style>
    <style:style style:name="T368" style:parent-style-name="DefaultParagraphFont" style:family="text">
      <style:text-properties style:font-name="Power Clear" fo:language="fr" fo:country="FR"/>
    </style:style>
    <style:style style:name="T369" style:parent-style-name="DefaultParagraphFont" style:family="text">
      <style:text-properties style:font-name="Cambria" style:font-name-complex="Cambria" fo:language="fr" fo:country="FR"/>
    </style:style>
    <style:style style:name="T370" style:parent-style-name="DefaultParagraphFont" style:family="text">
      <style:text-properties style:font-name="Power Clear" fo:language="fr" fo:country="FR"/>
    </style:style>
    <style:style style:name="P371" style:parent-style-name="Standard" style:family="paragraph">
      <style:text-properties style:font-name="Power Clear" fo:language="fr" fo:country="FR"/>
    </style:style>
    <style:style style:name="T372" style:parent-style-name="DefaultParagraphFont" style:family="text">
      <style:text-properties style:font-name="Power Clear" fo:language="fr" fo:country="FR"/>
    </style:style>
    <style:style style:name="T373" style:parent-style-name="DefaultParagraphFont" style:family="text">
      <style:text-properties style:font-name="Cambria" style:font-name-complex="Cambria" fo:language="fr" fo:country="FR"/>
    </style:style>
    <style:style style:name="T374" style:parent-style-name="DefaultParagraphFont" style:family="text">
      <style:text-properties style:font-name="Power Clear" fo:language="fr" fo:country="FR"/>
    </style:style>
    <style:style style:name="P375" style:parent-style-name="Standard" style:family="paragraph">
      <style:text-properties style:font-name="Power Clear" fo:language="fr" fo:country="FR"/>
    </style:style>
    <style:style style:name="T376" style:parent-style-name="DefaultParagraphFont" style:family="text">
      <style:text-properties style:font-name="Power Clear" fo:language="fr" fo:country="FR"/>
    </style:style>
    <style:style style:name="T377" style:parent-style-name="DefaultParagraphFont" style:family="text">
      <style:text-properties style:font-name="Cambria" style:font-name-complex="Cambria" fo:language="fr" fo:country="FR"/>
    </style:style>
    <style:style style:name="T378" style:parent-style-name="DefaultParagraphFont" style:family="text">
      <style:text-properties style:font-name="Power Clear" fo:language="fr" fo:country="FR"/>
    </style:style>
    <style:style style:name="T379" style:parent-style-name="DefaultParagraphFont" style:family="text">
      <style:text-properties style:font-name="Power Clear" fo:language="fr" fo:country="FR"/>
    </style:style>
    <style:style style:name="T380" style:parent-style-name="DefaultParagraphFont" style:family="text">
      <style:text-properties style:font-name="Cambria" style:font-name-complex="Cambria" fo:language="fr" fo:country="FR"/>
    </style:style>
    <style:style style:name="T381" style:parent-style-name="DefaultParagraphFont" style:family="text">
      <style:text-properties style:font-name="Power Clear" fo:language="fr" fo:country="FR"/>
    </style:style>
    <style:style style:name="T382" style:parent-style-name="DefaultParagraphFont" style:family="text">
      <style:text-properties style:font-name="Power Clear" fo:language="fr" fo:country="FR"/>
    </style:style>
    <style:style style:name="T383" style:parent-style-name="DefaultParagraphFont" style:family="text">
      <style:text-properties style:font-name="Cambria" style:font-name-complex="Cambria" fo:language="fr" fo:country="FR"/>
    </style:style>
    <style:style style:name="T384" style:parent-style-name="DefaultParagraphFont" style:family="text">
      <style:text-properties style:font-name="Power Clear" fo:language="fr" fo:country="FR"/>
    </style:style>
    <style:style style:name="P385" style:parent-style-name="Standard" style:family="paragraph">
      <style:text-properties style:font-name="Power Clear" fo:language="fr" fo:country="FR"/>
    </style:style>
    <style:style style:name="T386" style:parent-style-name="DefaultParagraphFont" style:family="text">
      <style:text-properties style:font-name="Power Clear" fo:language="fr" fo:country="FR"/>
    </style:style>
    <style:style style:name="T387" style:parent-style-name="DefaultParagraphFont" style:family="text">
      <style:text-properties style:font-name="Cambria" style:font-name-complex="Cambria" fo:language="fr" fo:country="FR"/>
    </style:style>
    <style:style style:name="T388" style:parent-style-name="DefaultParagraphFont" style:family="text">
      <style:text-properties style:font-name="Power Clear" fo:language="fr" fo:country="FR"/>
    </style:style>
    <style:style style:name="P389" style:parent-style-name="Standard" style:family="paragraph">
      <style:text-properties style:font-name="Power Clear" fo:language="fr" fo:country="FR"/>
    </style:style>
    <style:style style:name="T390" style:parent-style-name="DefaultParagraphFont" style:family="text">
      <style:text-properties style:font-name="Power Clear" fo:language="fr" fo:country="FR"/>
    </style:style>
    <style:style style:name="T391" style:parent-style-name="DefaultParagraphFont" style:family="text">
      <style:text-properties style:font-name="Cambria" style:font-name-complex="Cambria" fo:language="fr" fo:country="FR"/>
    </style:style>
    <style:style style:name="T392" style:parent-style-name="DefaultParagraphFont" style:family="text">
      <style:text-properties style:font-name="Power Clear" fo:language="fr" fo:country="FR"/>
    </style:style>
    <style:style style:name="P393" style:parent-style-name="Standard" style:family="paragraph">
      <style:text-properties style:font-name="Power Clear" fo:language="fr" fo:country="FR"/>
    </style:style>
    <style:style style:name="T394" style:parent-style-name="DefaultParagraphFont" style:family="text">
      <style:text-properties style:font-name="Power Clear" fo:language="fr" fo:country="FR"/>
    </style:style>
    <style:style style:name="T395" style:parent-style-name="DefaultParagraphFont" style:family="text">
      <style:text-properties style:font-name="Cambria" style:font-name-complex="Cambria" fo:language="fr" fo:country="FR"/>
    </style:style>
    <style:style style:name="T396" style:parent-style-name="DefaultParagraphFont" style:family="text">
      <style:text-properties style:font-name="Power Clear" fo:language="fr" fo:country="FR"/>
    </style:style>
    <style:style style:name="T397" style:parent-style-name="DefaultParagraphFont" style:family="text">
      <style:text-properties style:font-name="Power Clear" fo:language="fr" fo:country="FR"/>
    </style:style>
    <style:style style:name="T398" style:parent-style-name="DefaultParagraphFont" style:family="text">
      <style:text-properties style:font-name="Cambria" style:font-name-complex="Cambria" fo:language="fr" fo:country="FR"/>
    </style:style>
    <style:style style:name="T399" style:parent-style-name="DefaultParagraphFont" style:family="text">
      <style:text-properties style:font-name="Power Clear" fo:language="fr" fo:country="FR"/>
    </style:style>
    <style:style style:name="T400" style:parent-style-name="DefaultParagraphFont" style:family="text">
      <style:text-properties style:font-name="Power Clear" fo:language="fr" fo:country="FR"/>
    </style:style>
    <style:style style:name="T401" style:parent-style-name="DefaultParagraphFont" style:family="text">
      <style:text-properties style:font-name="Cambria" style:font-name-complex="Cambria" fo:language="fr" fo:country="FR"/>
    </style:style>
    <style:style style:name="T402" style:parent-style-name="DefaultParagraphFont" style:family="text">
      <style:text-properties style:font-name="Power Clear" fo:language="fr" fo:country="FR"/>
    </style:style>
    <style:style style:name="P403" style:parent-style-name="Standard" style:family="paragraph">
      <style:text-properties style:font-name="Power Clear" fo:language="fr" fo:country="FR"/>
    </style:style>
    <style:style style:name="P404" style:parent-style-name="Standard" style:family="paragraph">
      <style:text-properties fo:language="fr" fo:country="FR"/>
    </style:style>
  </office:automatic-styles>
  <office:body>
    <office:text text:use-soft-page-breaks="true">
      <text:p text:style-name="P1">Document général</text:p>
      <text:p text:style-name="P2"/>
      <text:p text:style-name="Standard"><text:span text:style-name="T3">La trame narrative prend place dans la région millénaire de Sishaon (déformation de<text:s/></text:span><text:span text:style-name="T4">四凶</text:span><text:span text:style-name="T5"><text:s/>Si Xi</text:span><text:span text:style-name="T6">ō</text:span><text:span text:style-name="T7">ng</text:span><text:span text:style-name="T8"> </text:span><text:span text:style-name="T9">: les 4 périls). Cette région est dirigée par un nouveau gouvernement mis en place après que la famille royale a été écartée du pouvoir à la suite d’un vote populaire.</text:span></text:p>
      <text:p text:style-name="Standard"><text:span text:style-name="T10">Le gouvernement souhaite moderniser la région et bâtir sa propre ligue. Les arènes se forment, mais la famille royale, humiliée par son évincement, complote en secret pour prendre sa revanche, à l’aide des Trésors du fléau</text:span><text:span text:style-name="T11"> </text:span><text:span text:style-name="T12">: 4 Pokémons légendaires du mythe fondateur de Sishaon</text:span><text:span text:style-name="T13"> </text:span><text:span text:style-name="T14">: jadis, un roi cruel utilisa ces 4 pokémons pour punir ceux qui le trahissaient ou lui faisaient de l’ombre. Ces Pokémons furent confinés à l’aide d’objets magiques pour entraver leurs néfastes effets.<text:s/></text:span></text:p>
      <text:p text:style-name="P15">Le but de la famille royale est de déclencher des catastrophes pour ensuite les résoudre et montrer au peuple qu’elle est davantage capable que le gouvernement actuel de protéger Sishaon.</text:p>
      <text:p text:style-name="P16"/>
      <text:p text:style-name="Standard"><text:span text:style-name="T17">Chapitre 1</text:span><text:span text:style-name="T18"> </text:span><text:span text:style-name="T19">:<text:s/></text:span></text:p>
      <text:p text:style-name="P20"/>
      <text:p text:style-name="Standard"><text:span text:style-name="T21">Ville</text:span><text:span text:style-name="T22"> </text:span><text:span text:style-name="T23">: Emos</text:span></text:p>
      <text:p text:style-name="P24"/>
      <text:p text:style-name="Standard"><text:span text:style-name="T25">Objets</text:span><text:span text:style-name="T26"> </text:span><text:span text:style-name="T27">:<text:s/></text:span></text:p>
      <text:p text:style-name="P28">Pokéball</text:p>
      <text:p text:style-name="P29">Perle</text:p>
      <text:p text:style-name="P30">Potion</text:p>
      <text:p text:style-name="Standard"/>
      <text:p text:style-name="Standard"><text:span text:style-name="T31">Le joueur commence son aventure à Emos, une ville de Sishaon. C’est la fête dans les rues</text:span><text:span text:style-name="T32"> </text:span><text:span text:style-name="T33">: le peuple célèbre le 10</text:span><text:span text:style-name="T34">ème</text:span><text:span text:style-name="T35"><text:s/>anniversaire de la République démocratique de Sishaon, le «</text:span><text:span text:style-name="T36"> </text:span><text:span text:style-name="T37">Jour de la liberté</text:span><text:span text:style-name="T38"> </text:span><text:span text:style-name="T39">»</text:span><text:span text:style-name="T40">.</text:span></text:p>
      <text:p text:style-name="P41">A cette occasion, le joueur rencontre son ami d’enfance, Milo, qui l’invite à profiter de la fête pour échapper à la surveillance des rangers (les protecteurs de la région) et d’aller observer les Pokémons sauvages dans la clairière derrière le village. On doit s’y rendre en évitant les rangers.</text:p>
      <text:p text:style-name="P42"/>
      <text:p text:style-name="Standard"><text:span text:style-name="T43">Dans la clairière, on rencontre un voyageur aux prises avec un sbire étrange qui veut lui voler ses Pokémons. Des rangers arrivent alors, et le sbire fuit. Pour récompenser le courage des deux garçons, le voyageur leur offre à chacun un de ses Pokémons. On peut choisir le starter</text:span><text:span text:style-name="T44"> </text:span><text:span text:style-name="T45">:</text:span></text:p>
      <text:p text:style-name="Standard"><text:span text:style-name="T46">Vipélierre</text:span><text:span text:style-name="T47">,<text:s/></text:span><text:span text:style-name="T48">Poussifeu</text:span><text:span text:style-name="T49">, ou<text:s/></text:span><text:span text:style-name="T50">Tiplouf</text:span><text:span text:style-name="T51">.<text:s/></text:span></text:p>
      <text:p text:style-name="P52"/>
      <text:p text:style-name="P53">Clairière d’Emos<text:s/></text:p>
      <text:p text:style-name="Standard"><text:span text:style-name="T54">Pokémons sauvages</text:span><text:span text:style-name="T55"> </text:span><text:span text:style-name="T56">:</text:span></text:p>
      <text:p text:style-name="P57">Ponchiot</text:p>
      <text:p text:style-name="P58">Minisange</text:p>
      <text:p text:style-name="P59">Lilliterelle</text:p>
      <text:p text:style-name="P60"/>
      <text:p text:style-name="P61">Milo veut partir affronter l’arène d’Emos, mais le champion est en voyage. Les rangers vous recommandent d’aller participer au tournoi local à Jovalia, la ville voisine, qui en organise un pour fêter le Jour de la liberté. Milo s’y précipite.</text:p>
      <text:p text:style-name="P62"/>
      <text:p text:style-name="P63">Route 1</text:p>
      <text:p text:style-name="Standard"><text:span text:style-name="T64">Pokémons sauvages</text:span><text:span text:style-name="T65"> </text:span><text:span text:style-name="T66">:<text:s/></text:span></text:p>
      <text:p text:style-name="P67">Ponchiot</text:p>
      <text:p text:style-name="P68">Minisange</text:p>
      <text:p text:style-name="P69">Lilliterelle</text:p>
      <text:soft-page-break/>
      <text:p text:style-name="P70">Sabelette</text:p>
      <text:p text:style-name="P71"/>
      <text:p text:style-name="Standard"><text:span text:style-name="T72">Ville</text:span><text:span text:style-name="T73"> </text:span><text:span text:style-name="T74">: Jovalia</text:span></text:p>
      <text:p text:style-name="P75"/>
      <text:p text:style-name="P76">Il y a beaucoup de participants au tournoi. On peut se qualifier parmi les juniors puisqu’on ne possède aucun badge d’arène. On rencontre en ville Émilie, qui est aussi venue pour combattre en tant que junior.</text:p>
      <text:p text:style-name="P77"/>
      <text:p text:style-name="Standard"><text:span text:style-name="T78">Tournoi de Jovalia</text:span><text:span text:style-name="T79"> </text:span><text:span text:style-name="T80">:<text:s/></text:span></text:p>
      <text:p text:style-name="P81">On affronte Émilie, puis un dresseur nommé Alistair, et enfin Milo en finale.</text:p>
      <text:p text:style-name="P82"/>
      <text:p text:style-name="P83">A la sortie de la ville, Alistair nous retrouve. Il nous félicite pour votre talent lors du tournoi.</text:p>
      <text:p text:style-name="P84">Vous pouvez emprunter la route 2 pour retourner à Emos. Un passage par le Puits perdu est aussi possible. Pour atteindre la suite, il faut la CS Éclate-Roc.</text:p>
      <text:p text:style-name="P85"/>
      <text:p text:style-name="P86">Route 2</text:p>
      <text:p text:style-name="Standard"><text:span text:style-name="T87">Pokémons sauvages</text:span><text:span text:style-name="T88"> </text:span><text:span text:style-name="T89">:</text:span></text:p>
      <text:p text:style-name="P90">Minisange</text:p>
      <text:p text:style-name="P91">Liliterelle</text:p>
      <text:p text:style-name="P92">Pandespiègle</text:p>
      <text:p text:style-name="P93">Doudouvet</text:p>
      <text:p text:style-name="P94">Chlorobule</text:p>
      <text:p text:style-name="P95"/>
      <text:p text:style-name="Standard"><text:span text:style-name="T96">Puits perdu</text:span><text:span text:style-name="T97"> </text:span><text:span text:style-name="T98">:</text:span></text:p>
      <text:p text:style-name="P99">Nodulithe</text:p>
      <text:p text:style-name="P100">Balignon</text:p>
      <text:p text:style-name="P101">Gribouraigne</text:p>
      <text:p text:style-name="P102">Araqua</text:p>
      <text:p text:style-name="P103"/>
      <text:p text:style-name="P104">Retour à Emos pour affronter la première arène, de type Normal.</text:p>
      <text:p text:style-name="Standard"><text:span text:style-name="T105">Pokémons de l’arène</text:span><text:span text:style-name="T106"> </text:span><text:span text:style-name="T107">: Ponchiot, Teddiursa, Cerfrousse (signature du champion)</text:span></text:p>
      <text:p text:style-name="P108"/>
      <text:p text:style-name="Standard"><text:span text:style-name="T109">On obtient le premier badge et la capacité d’utiliser Éclate-roc hors combat</text:span><text:span text:style-name="T110"> </text:span><text:span text:style-name="T111">!</text:span></text:p>
      <text:p text:style-name="P112"/>
      <text:p text:style-name="P113">A la sortie de l’arène, Alistair nous intercepte et nous demande votre aide pour accéder au puits perdu, désormais que vous pouvez briser les rochers qui lui barrent la route. Il prétend chercher un objet qu’il a fait tomber au fond du puits. Vous le retrouvez là-bas.</text:p>
      <text:p text:style-name="P114"/>
      <text:p text:style-name="P115">Au fond du puits perdu, Alistair trouve un vase ancien et vous remercie de votre aide. Il part avec le vase.</text:p>
      <text:p text:style-name="P116"/>
      <text:p text:style-name="Standard"><text:span text:style-name="T117">Direction la route 3 pour poursuivre votre aventure des arènes</text:span><text:span text:style-name="T118"> </text:span><text:span text:style-name="T119">!</text:span></text:p>
      <text:p text:style-name="P120"/>
      <text:p text:style-name="P121">Route 3</text:p>
      <text:p text:style-name="Standard"><text:span text:style-name="T122">Pokémons sauvages</text:span><text:span text:style-name="T123"> </text:span><text:span text:style-name="T124">:</text:span></text:p>
      <text:p text:style-name="P125">Minisange</text:p>
      <text:p text:style-name="P126">Pandespiègle</text:p>
      <text:p text:style-name="P127">Cabriolaine</text:p>
      <text:p text:style-name="P128">Teddiursa</text:p>
      <text:p text:style-name="P129">Emolga</text:p>
      <text:soft-page-break/>
      <text:p text:style-name="P130">Stalgamin</text:p>
      <text:p text:style-name="P131"/>
      <text:p text:style-name="P132">Au sommet de la route 3 se trouve le Perchoir de Naïven. En ville, on surprend une conversation louche entre des sbires étranges, qui parlent du trésor du perchoir et de la route 4, où leur échappatoire sera possible. Quand les sbires nous entendent, ils s’éloignent.</text:p>
      <text:p text:style-name="Standard"><text:span text:style-name="T133">On affronte Milo. Ensuite, on bat l’arène et on apprend qu’un vol vient d’avoir lieu dans le grand temple. Ce seraient les tablettes anciennes qui auraient été volées</text:span><text:span text:style-name="T134"> </text:span><text:span text:style-name="T135">! On parle à Milo de la route 4, et on s’y rend car les voleurs s’y dirigeraient pour s’enfuir.</text:span></text:p>
      <text:p text:style-name="P136"/>
      <text:p text:style-name="P137">Route 4</text:p>
      <text:p text:style-name="Standard"><text:span text:style-name="T138">Pokémons sauvages</text:span><text:span text:style-name="T139"> </text:span><text:span text:style-name="T140">:<text:s/></text:span></text:p>
      <text:p text:style-name="P141">Cabriolaine</text:p>
      <text:p text:style-name="P142">Teddiursa</text:p>
      <text:p text:style-name="P143">Scorplane</text:p>
      <text:p text:style-name="P144">Goupix</text:p>
      <text:p text:style-name="P145">Férosinge</text:p>
      <text:p text:style-name="P146">Baudrive</text:p>
      <text:p text:style-name="P147"/>
      <text:p text:style-name="P148">Au bout, on affronte la Team Régalia et apprend qu’Alistair est l’ancien prince déchu de Sishaon, et qu’il a orchestré le cambriolage de ces artefacts. Ils s’enfuient à bord d’un dirigeable.</text:p>
      <text:p text:style-name="P149"/>
      <text:p text:style-name="P150">De retour à Naïven, les rangers ont été mobilisés et ont découvert que le Vase a également été volé. Ils vous demandent de rester hors de ces histoires. Milo est très frustré d’être mis de côté.</text:p>
      <text:p text:style-name="P151"/>
      <text:p text:style-name="P152">Route 5</text:p>
      <text:p text:style-name="P153"/>
      <text:p text:style-name="Standard"><text:span text:style-name="T154">Ville</text:span><text:span text:style-name="T155"> </text:span><text:span text:style-name="T156">: Prudan</text:span></text:p>
      <text:p text:style-name="P157"/>
      <text:p text:style-name="P158">On arrive à Prudan et Émilie nous alpague pour nous faire assister au spectacle de danse de Kimiko, une danseuse réputée. Après le spectacle, au cours duquel on remarque les perles de Kimiko, on retrouve Isaac qui dit connaître Alistair qu’il aurait déjà rencontré, et trouve son implication dans le vol des tablettes douteuse. Il part sans plus de détails.</text:p>
      <text:p text:style-name="P159">Au spectacle de danse, on est abordés par Faust, qui se présente comme un chef d’entreprise issu de la capitale, Hardia, et qui apprécie les anciennes traditions conservées à l’ouest de la région. Il nous souhaite bonne chance pour notre voyage.</text:p>
      <text:p text:style-name="Standard"><text:span text:style-name="T160">On affronte l’arène de type Eau. Après la victoire, Émilie revient nous voir pour nous dire qu’on peut aller voir une séance de dédicace de Kimiko. On retourne au palais et rencontre la danseuse dans sa loge. Or, au même moment, un Férosinge fait irruption dans la salle et vole les perles laissées sur la table</text:span><text:span text:style-name="T161"> </text:span><text:span text:style-name="T162">! On sort en ville et on doit le poursuivre, jusque dans les hauts quartiers où on découvre son dresseur</text:span><text:span text:style-name="T163"> </text:span><text:span text:style-name="T164">: le voleur de la clairière d’Emos, qui se présente</text:span><text:span text:style-name="T165"> </text:span><text:span text:style-name="T166">: Keith. On découvre qu’il a été missionné par la team Régalia pour s’emparer des perles</text:span><text:span text:style-name="T167"> </text:span><text:span text:style-name="T168">: des sbires cachés arrivent. On affronte Keith en duo avec un sbire Régalia. Malgré notre victoire, les perles ont été volées.</text:span></text:p>
      <text:p text:style-name="P169">Kimiko nous offre la CS Surf pour poursuivre notre aventure.</text:p>
      <text:p text:style-name="P170"/>
      <text:p text:style-name="P171">Accès aux routes 6 et 7 grâce à Surf. Les deux se rejoignent mais deux chemins sont possibles.</text:p>
      <text:p text:style-name="Standard"><text:span text:style-name="T172">La route 6 est au nord de la route 5. La route 7 est au nord de Prudan.</text:span></text:p>
      <text:p text:style-name="P173"/>
      <text:p text:style-name="Standard"><text:span text:style-name="T174">Ville</text:span><text:span text:style-name="T175"> </text:span><text:span text:style-name="T176">: Persever</text:span></text:p>
      <text:p text:style-name="P177"/>
      <text:p text:style-name="P178">On rencontre Alistair en ville, avec Milo.</text:p>
      <text:soft-page-break/>
      <text:p text:style-name="P179">En enquêtant avec Milo, on découvre que la team Régalia compte s’enfuir avec les trésors à bord d’un train secret caché dans la mine de Persever qui s’apprête à quitter la ville pour la capitale.<text:s/></text:p>
      <text:p text:style-name="P180">On bat l’arène pour obtenir la CS Force et débloquer le chemin dans la mine.</text:p>
      <text:p text:style-name="P181">On s’infiltre dans le train avec Milo, et au fond, Milo est vaincu en combat par Keith. On affronte Alistair et on gagne, mais malgré notre victoire, des renforts de la team Régalia arrivent, nous forçant à fuir en sautant par-dessus bord avec Milo, qui a été humilié par Keith et Alistair.</text:p>
      <text:p text:style-name="P182"/>
      <text:p text:style-name="P183">On a été repêchés et secourus par des rangers qui tiennent un centre Pokémons, sur la rive, non loin de la capitale. Connor est là et vous lui racontez vos découvertes. Milo est encore endormi, épuisé par son combat. Connor part et vous apprend qu’il a prévenu votre amie, Émilie.</text:p>
      <text:p text:style-name="P184">Vous sortez, Milo étant encore endormi. Émilie vous dispute pour vous être mis en danger. Elle veut néanmoins participer et ne pas rester les bras croisés et cherche Isaac. Selon elle, il est rentré chez ses parents, à Hardia, la capitale de Sishaon. Émilie vous donne rendez-vous en ville.</text:p>
      <text:p text:style-name="P185">Vous retournez voir Milo, qui est réveillé, mais dégoûté par sa défaite. Il compte rester ici en attendant et mettre un terme à son aventure.<text:line-break/>Ce bâtiment est également la pension Pokémon.</text:p>
      <text:p text:style-name="P186"/>
      <text:p text:style-name="P187">Route 9</text:p>
      <text:p text:style-name="P188"/>
      <text:p text:style-name="Standard"><text:span text:style-name="T189">Ville</text:span><text:span text:style-name="T190"> </text:span><text:span text:style-name="T191">: Hardia</text:span></text:p>
      <text:p text:style-name="P192"/>
      <text:p text:style-name="P193">A Hardia, on<text:s/>rencontre Faust à nouveau, qui nous redirige vers le palais résidentiel pour trouver Isaac, qui selon lui doit s’y trouver. On<text:s/>apprend qu’Isaac est le fils du président et qu’il a l’ordre de rester chez lui. Cependant, il vient nous transmettre un mot au portail, indiquant qu’il va s’échapper grâce à un passage secret situé sous la résidence et menant au jardin, qu’on peut atteindre avec Coupe. On le retrouve donc et on retrouve Émilie à la décharge pour être à l’abri des regards indiscrets.</text:p>
      <text:p text:style-name="P194">Isaac nous avoue la vérité sur son identité, et sur les craintes de son père concernant les 4 trésors. Il veut mener une mission d’infiltration dans l’actuelle résidence de la famille royale, non loin sur la route 10. C’est ici qu’ils vivent après avoir été chassés du pouvoir. Isaac préfère que Milo reste loin de cette affaire car sa dernière défaite l’a fragilisé.</text:p>
      <text:p text:style-name="P195"/>
      <text:p text:style-name="P196">Route 10</text:p>
      <text:p text:style-name="P197"/>
      <text:p text:style-name="Standard"><text:span text:style-name="T198">On retrouve Isaac et Émilie aux abords de la résidence luxueuse de la famille royale. Or, il semble impossible de rentrer car la demeure est surveillée. Émilie a une idée</text:span><text:span text:style-name="T199"> </text:span><text:span text:style-name="T200">: passer par les égouts de Hardia pour trouver la ligne de chemin de fer abandonnée qui conduit à la résidence, puisque c’est sûrement là-bas qu’Alistair a fait livrer les trésors.</text:span></text:p>
      <text:p text:style-name="P201"/>
      <text:p text:style-name="P202">Égouts de Hardia</text:p>
      <text:p text:style-name="P203"/>
      <text:p text:style-name="P204">On retrouve la trace du chemin de fer et allons plus loin dans le tunnel abandonné. Isaac se joint à l’équipe tandis qu’Émilie part en éclaireuse.</text:p>
      <text:p text:style-name="P205"/>
      <text:p text:style-name="P206">Résidence Régalia.</text:p>
      <text:p text:style-name="P207"/>
      <text:p text:style-name="P208">En entrant dans la résidence, on est surpris par Alistair et sa sœur, Aliénor. Celle-ci nous affronte en s’amusant de notre intrusion.</text:p>
      <text:p text:style-name="P209">Après le combat, l’ancienne reine Ismérie fait son entrée et réprimande ses enfants. Elle nous fait savoir qu’elle a averti le président de l’évasion de son fils et nous prie de quitter les lieux, tout en<text:s/><text:soft-page-break/>nous assurant qu’elle se chargera de punir Alistair et Aliénor comme il se doit.</text:p>
      <text:p text:style-name="P210"/>
      <text:p text:style-name="P211">En sortant, la garde rapprochée du président vient chercher Isaac, et nous laisse là, avec Émilie. Cette dernière insiste pour retourner au palais présidentiel à Hardia, car elle pense qu’Alistair et sa sœur n’ont pas abandonné leurs projets.</text:p>
      <text:p text:style-name="P212"/>
      <text:p text:style-name="P213">Retour à Hardia, Isaac insiste pour nous faire entrer. Réunion avec le président de Sishaon,<text:s/>Aurèle, qui veut avant tout protéger son fils.<text:s/>Faust est également présent.<text:s/>Isaac ne veut plus être protégé et demande à prouver sa valeur en nous affrontant, dans la cour. Combat contre Isaac. Suite à cela, Faust croit en notre potentiel et veut que l’on affronte l’arène de Hardia (type électric), qui est dirigée par le grand-frère d’Isaac, Ohmère. Or, ce dernier nous prend de haut et veut d’abord que l’on obtienne le cinquième badge avant de nous affronter (en réalité car l’arène est dysfonctionnelle). On doit obtenir la bicyclette en ville et traverser la piste cyclable pour atteindre le sud, une station balnéaire siège de l’arène de type Plante.</text:p>
      <text:p text:style-name="Standard"><text:span text:style-name="T214">A la boutique de vélo, Faust nous rejoint et explique que beaucoup des commerces de la ville appartiennent à sa société. Il nous offre la bicyclette, voyant que l’on n’a pas les moyens de se la payer, car il aime «</text:span><text:span text:style-name="T215"> </text:span><text:span text:style-name="T216">subventionner les talents</text:span><text:span text:style-name="T217"> </text:span><text:span text:style-name="T218">»</text:span><text:span text:style-name="T219">.</text:span></text:p>
      <text:p text:style-name="P220"/>
      <text:p text:style-name="Standard"><text:span text:style-name="T221">Ville</text:span><text:span text:style-name="T222"> </text:span><text:span text:style-name="T223">: Plassidio<text:s/></text:span></text:p>
      <text:p text:style-name="P224"/>
      <text:p text:style-name="P225">On rencontre Milo en ville, qu’on affronte. Une fois l’arène vaincue elle aussi, on ressent un profond sentiment de malaise en en sortant. Milo est dehors, lui aussi avec Émilie. Les deux ont aussi eu ce mauvais ressenti, or Émilie convainc Milo qu’il ne s’agit de rien, et lui recommande de poursuivre son défi des arènes. Milo part, confus. Émilie nous confie ensuite qu’elle pense qu’il se passe quelque chose de grave et nous donne rendez-vous à l’autel de la peur. Or, il s’avère que Milo nous écoutait en secret et a tout entendu.</text:p>
      <text:p text:style-name="P226"/>
      <text:p text:style-name="Standard"><text:span text:style-name="T227">Plassidio</text:span><text:span text:style-name="T228"> </text:span><text:span text:style-name="T229">: croisière sur les îles.</text:span></text:p>
      <text:p text:style-name="P230"/>
      <text:p text:style-name="P231">Possibilité de partir en croisière sur différentes îles au large. Une chasse au trésor est organisée sur l’île. Il faut trouver le trésor avant les autres concurrents. Les affronter et les battre les fait s’arrêter.</text:p>
      <text:p text:style-name="P232"/>
      <text:p text:style-name="P233">Route 11</text:p>
      <text:p text:style-name="P234"/>
      <text:p text:style-name="P235">Autel de la peur</text:p>
      <text:p text:style-name="P236"/>
      <text:p text:style-name="P237">Sur place, le sentiment de peur se reproduit. Isaac et Émilie sont là, et avancent dans le désert.</text:p>
      <text:p text:style-name="P238">Une fois dans le désert, une tempête de sable se lève et le sentiment de peur s’intensifie. Isaac est certain que c’est l’œuvre de Dinglu, le trésor du fléau hantant le vase imprégné de peur.</text:p>
      <text:p text:style-name="P239">Des sbires Régalia s’interposent durant notre progression jusqu’au temple. On les affronte en duo avec Isaac.</text:p>
      <text:p text:style-name="P240">L’intérieur du temple est assez étroit. Il y a des sbires à affronter sur la route jusqu’au sommet. Là-haut, Alistair achève le rituel et ramène le Pokémon Dinglu, qu’il maîtrise avec son bracelet. Alistair déclare que la première phase de leur plan est menée à bien et que tout le peuple de Sishaon a ressenti cette peur, qui annonce le grand bouleversement à venir. Il nous affronte avec son nouvel allié.</text:p>
      <text:p text:style-name="P241">Vaincu, il part. Milo arrive et est déçu qu’on ne l’ait pas tenu au courant. Isaac nous redirige vers l’autel du mépris, où un autre trésor du fléau risque d’être réveillé.</text:p>
      <text:p text:style-name="P242"/>
      <text:p text:style-name="P243">Chenal 12</text:p>
      <text:p text:style-name="P244"/>
      <text:p text:style-name="P245">Route 14</text:p>
      <text:p text:style-name="P246"/>
      <text:p text:style-name="Standard"><text:span text:style-name="T247">Ville</text:span><text:span text:style-name="T248"> </text:span><text:span text:style-name="T249">: Rankor</text:span></text:p>
      <text:p text:style-name="P250"/>
      <text:p text:style-name="P251">On rencontre Milo, qui nous informe qu’une délégation de la famille royale est présente sur place. Milo est assez froid à notre égard. On rejoint les ruines aux nord de la ville et les sbires Régalia, qui surveillent l’entrée. On les affronte en duo avec Milo.</text:p>
      <text:p text:style-name="P252"/>
      <text:p text:style-name="P253">Vaincus, ils partent et soudain, un sentiment de haine s’empare du joueur et de Milo. Milo s’énerve contre le joueur, qui est venu l’aider, et part seul pour se venger. On le suit jusqu’à l’autel du mépris.</text:p>
      <text:p text:style-name="P254"/>
      <text:p text:style-name="P255">Autel du mépris</text:p>
      <text:p text:style-name="P256"/>
      <text:p text:style-name="P257">On affronte les sbires Régalia en chemin, et atteint le temple dans lequel Méryl prépare le rituel pour éveiller Chongjian. La reine Ismérie se montre, révélant qu’elle est à la tête de la team Régalia et que son but est de reprendre le pouvoir en semant le chaos en Sishaon grâce aux trésors du fléau. Elle part avec sa délégation en laissant sa fille éveiller et contrôler Chongjian. On l’affronte.</text:p>
      <text:p text:style-name="P258">La défaite de Méryl la laisse de marbre et elle part en notant toutefois que Milo semble sensible aux émotions exacerbées par le trésor du fléau. Elle vous indique donc que l’autel de l’avarice se trouve sur la route 14. Milo est en colère et veut pourchasser Ismérie jusqu’au volcan qui abrite l’autel de l’avarice.</text:p>
      <text:p text:style-name="P259"/>
      <text:p text:style-name="P260">Chenal 13</text:p>
      <text:p text:style-name="P261"/>
      <text:p text:style-name="P262">Route 15</text:p>
      <text:p text:style-name="P263"/>
      <text:p text:style-name="P264">Mont Kupi</text:p>
      <text:p text:style-name="P265"/>
      <text:p text:style-name="P266">On affronte Souleymane, puis Ismérie au sommet, qui invoque Yuyu, le trésor de l’avarice. Malgré notre victoire, Yuyu se prépare à lancer une puissante attaque, et Milo s’interpose pour l’affronter, vous laissant le temps à Émilie, Isaac et vous, de vous échapper.</text:p>
      <text:p text:style-name="P267"/>
      <text:p text:style-name="P268">Route 16</text:p>
      <text:p text:style-name="P269"/>
      <text:p text:style-name="Standard"><text:span text:style-name="T270">Ville</text:span><text:span text:style-name="T271"> </text:span><text:span text:style-name="T272">: Port de Stalno</text:span></text:p>
      <text:p text:style-name="P273"/>
      <text:p text:style-name="P274">On retrouve Emilie en ville, qui est embêtée car le champion actuel de la ville, Douglas, est très âgé et compte prendre sa retraite. Il serait parti au nord, pour observer les Balbalèzes.<text:s/></text:p>
      <text:p text:style-name="P275"><text:s/></text:p>
      <text:p text:style-name="P276">Chenal 17</text:p>
      <text:p text:style-name="P277"/>
      <text:p text:style-name="P278">Chenal 18</text:p>
      <text:p text:style-name="P279"/>
      <text:p text:style-name="P280">On retrouve Douglas qui s’occupe d’un Balbalèze blessé. Ce dernier a besoin de baies argentées pour le guérir. Émilie accepte de lui prodiguer les premiers soins pendant qu’on ira chercher les baies argentées.</text:p>
      <text:p text:style-name="P281"/>
      <text:p text:style-name="P282">Une fois la potion préparée, Emilie soigne le Balbalèze et Douglas voit en elle la future championne d’arène de Stalno. Douglas lui propose de la retrouver en ville. Emilie est ravie mais n’est pas sûre<text:s/><text:soft-page-break/>d’être à la hauteur.</text:p>
      <text:p text:style-name="P283"/>
      <text:p text:style-name="P284">A Stalno, on retrouve Emilie qui nous confie ses craintes mais finit par accepter la proposition afin de protéger Sishaon. On la retrouve à l’arène et on l’affronte.</text:p>
      <text:p text:style-name="P285"/>
      <text:p text:style-name="P286">Après la victoire, des sbires Régalia viennent nous voir en ville pour nous informer que notre camarade Milo est détenu au manoir Régalia. Ils demandent à ce qu’on leur livre le quatrième trésor en échange de sa liberté. Emilie arrive et on affronte les sbires. Ensuite, Emilie décide de lancer l’offensive sur le manoir, ayant compris les responsabilités qui sont désormais les siennes. Direction le manoir Régalia sur la route 10.</text:p>
      <text:p text:style-name="P287"/>
      <text:p text:style-name="P288">Isaac est à l’entrée, avec des gardes du gouvernement, en affrontement contre les sbires Régalia. On peut entrer dans la grande salle et atteindre les quartiers résidentiels. Le président Faust est là aussi.</text:p>
      <text:p text:style-name="P289"/>
      <text:p text:style-name="Standard"><text:span text:style-name="T290">On affronte une dernière fois Keith, puis on libère Milo qui semble changé. On passe la nuit au palais présidentiel. Or, au matin, les gardes découvrent que l’épée a été volée</text:span><text:span text:style-name="T291"> </text:span><text:span text:style-name="T292">! Milo est le coupable. L’autel de la rage se trouve au sommet des grands glaciers. Le président nous offre la CS Cascade pour poursuivre Milo et l’arrêter.</text:span></text:p>
      <text:p text:style-name="P293"/>
      <text:p text:style-name="P294">Grands glaciers</text:p>
      <text:p text:style-name="P295"/>
      <text:p text:style-name="Standard"><text:span text:style-name="T296">Ville</text:span><text:span text:style-name="T297"> </text:span><text:span text:style-name="T298">: Retraite de Tantrum</text:span></text:p>
      <text:p text:style-name="P299"/>
      <text:p text:style-name="P300">L’accès aux grands glaciers est interdit à tous ceux qui ne disposent pas des 8 badges. Il faut affronter le champion de l’arène de type dragon pour avoir le droit de continuer.</text:p>
      <text:p text:style-name="P301"/>
      <text:p text:style-name="Standard"><text:span text:style-name="T302">Après la victoire, les Pokémons des habitants commencent à devenir incontrôlables et se battre</text:span><text:span text:style-name="T303"> </text:span><text:span text:style-name="T304">! C’est le pouvoir de Baojian, le fléau de la violence. On se dirige vers l’autel de la rage pour arrêter Milo.</text:span></text:p>
      <text:p text:style-name="P305"/>
      <text:p text:style-name="P306">Grands glaciers</text:p>
      <text:p text:style-name="P307"/>
      <text:p text:style-name="P308">Autel de la rage</text:p>
      <text:p text:style-name="P309"/>
      <text:p text:style-name="P310">Au sommet, on affronte Milo. Or, malgré sa défaite, les 4 trésors du fléau sont éveillés. Arrive alors le dirigeable de la famille royale, et des sbires Régalia qui interceptent Baojian. On monte à bord avec Milo.</text:p>
      <text:p text:style-name="P311"/>
      <text:p text:style-name="P312">Dirigeable Régalia</text:p>
      <text:p text:style-name="P313"/>
      <text:p text:style-name="P314">On affronte les 4 trésors du fléau qui, grâce à la relation née entre le joueur et son équipe, sont calmés et reviennent à l’état d’artefacts (on ne peut pas les capturer).<text:s/></text:p>
      <text:p text:style-name="Standard"><text:span text:style-name="T315">Après avoir calmé les 3 trésors, c’est Milo qui intervient pour calmer Baojian, en renonçant à sa colère.<text:s/></text:span><text:span text:style-name="T316">Arrive alors le véritable chef de la team Régalia</text:span><text:span text:style-name="T317"> </text:span><text:span text:style-name="T318">: Faust, qui complotait en réalité pour prendre le contrôle de la région aux côtés de la famille royale. On l’affronte et le vainc définitivement.<text:s/></text:span><text:span text:style-name="T319">Le dirigeable prend feu, et on s’en échappe avec Milo.</text:span></text:p>
      <text:p text:style-name="P320"/>
      <text:p text:style-name="P321">Les plans de la team Régalia sont compromis. On peut désormais se rendre à la ligue Pokémon.</text:p>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Emos</text:p>
      <text:p text:style-name="P341">Jovalia (joie)</text:p>
      <text:p text:style-name="P342">Naïven (naïveté)</text:p>
      <text:p text:style-name="P343">Prudan (prudence)</text:p>
      <text:p text:style-name="P344">Persever (persévérance)</text:p>
      <text:p text:style-name="P345">Hardia (hardiesse)</text:p>
      <text:p text:style-name="P346">Plassidio (placidité)</text:p>
      <text:p text:style-name="P347">Rankor (rancœur)</text:p>
      <text:p text:style-name="P348">Stalno (nostalgie)</text:p>
      <text:p text:style-name="P349">Tantrum (colère)</text:p>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Standard"><text:span text:style-name="T364">Pokémons d’eau</text:span><text:span text:style-name="T365"> </text:span><text:span text:style-name="T366">:<text:s/></text:span></text:p>
      <text:p text:style-name="P367"/>
      <text:p text:style-name="Standard"><text:span text:style-name="T368">Eau douce (rivière, lac)</text:span><text:span text:style-name="T369"> </text:span><text:span text:style-name="T370">:</text:span></text:p>
      <text:p text:style-name="P371"/>
      <text:p text:style-name="Standard"><text:span text:style-name="T372">Surf</text:span><text:span text:style-name="T373"> </text:span><text:span text:style-name="T374">: Bargantua, Araqua, Psykokwak</text:span></text:p>
      <text:p text:style-name="P375"/>
      <text:p text:style-name="Standard"><text:span text:style-name="T376">Vieille canne</text:span><text:span text:style-name="T377"> </text:span><text:span text:style-name="T378">: Magicarpe, Embrochet</text:span></text:p>
      <text:p text:style-name="Standard"><text:span text:style-name="T379">Super canne</text:span><text:span text:style-name="T380"> </text:span><text:span text:style-name="T381">: Embrochet</text:span></text:p>
      <text:p text:style-name="Standard"><text:span text:style-name="T382">Méga canne</text:span><text:span text:style-name="T383"> </text:span><text:span text:style-name="T384">: Léviator, Hastacuda</text:span></text:p>
      <text:p text:style-name="P385"/>
      <text:p text:style-name="Standard"><text:span text:style-name="T386">Eau salée (mer, océan)</text:span><text:span text:style-name="T387"> </text:span><text:span text:style-name="T388">:</text:span></text:p>
      <text:p text:style-name="P389"/>
      <text:p text:style-name="Standard"><text:span text:style-name="T390">Surf</text:span><text:span text:style-name="T391"> </text:span><text:span text:style-name="T392">: Goélise, Bekipan, Rémoraid, Sépiatop, Loupiot</text:span></text:p>
      <text:p text:style-name="P393"/>
      <text:p text:style-name="Standard"><text:span text:style-name="T394">Vieille canne</text:span><text:span text:style-name="T395"> </text:span><text:span text:style-name="T396">: Magicarpe, Rémoraid</text:span></text:p>
      <text:p text:style-name="Standard"><text:span text:style-name="T397">Super canne</text:span><text:span text:style-name="T398"> </text:span><text:span text:style-name="T399">: Rémoraid, Kokiyas, Flingouste, Venalgue</text:span></text:p>
      <text:p text:style-name="Standard"><text:span text:style-name="T400">Méga canne</text:span><text:span text:style-name="T401"> </text:span><text:span text:style-name="T402">: Léviator, Crustabri</text:span></text:p>
      <text:p text:style-name="P403"/>
      <text:p text:style-name="P4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ptos Display" svg:font-family="Aptos Display" style:font-family-generic="swiss" style:font-pitch="variable"/>
    <style:font-face style:name="Power Clear" svg:font-family="Power Clear" style:font-family-generic="system" style:font-pitch="variable" svg:panose-1="1 0 0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Normal">
      <style:paragraph-properties style:contextual-spacing="true"/>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ierre Baudinet</meta:initial-creator>
    <dc:creator>Pierre Baudinet</dc:creator>
    <meta:creation-date>2009-04-16T11:32:00Z</meta:creation-date>
    <dc:date>2026-06-08T18:19:00Z</dc:date>
    <meta:template xlink:href="Normal.dotm" xlink:type="simple"/>
    <meta:editing-cycles>102</meta:editing-cycles>
    <meta:editing-duration>PT130020S</meta:editing-duration>
    <meta:user-defined meta:name="Info 1"/>
    <meta:user-defined meta:name="Info 2"/>
    <meta:user-defined meta:name="Info 3"/>
    <meta:user-defined meta:name="Info 4"/>
    <meta:document-statistic meta:page-count="9" meta:paragraph-count="35" meta:word-count="2749" meta:character-count="17839" meta:row-count="126" meta:non-whitespace-character-count="15125"/>
  </office:meta>
</office:document-meta>
</file>